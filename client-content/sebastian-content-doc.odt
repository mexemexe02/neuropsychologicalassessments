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Noto Sans Symbols" svg:font-family="'Noto Sans Symbols'"/>
    <style:font-face style:name="Aptos" svg:font-family="Aptos" style:font-family-generic="roman" style:font-pitch="variable"/>
    <style:font-face style:name="Calibri" svg:font-family="Calibri" style:font-family-generic="roman" style:font-pitch="variable"/>
    <style:font-face style:name="Play" svg:font-family="Play"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ptos1" svg:font-family="Aptos"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Noto Sans Symbols1" svg:font-family="'Noto Sans Symbols'" style:font-family-generic="system" style:font-pitch="variable"/>
    <style:font-face style:name="Play1" svg:font-family="Play"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in" fo:margin-top="0in" fo:margin-bottom="0in" table:align="center"/>
    </style:style>
    <style:style style:name="Table1.A" style:family="table-column">
      <style:table-column-properties style:column-width="3.4in"/>
    </style:style>
    <style:style style:name="Table1.B" style:family="table-column">
      <style:table-column-properties style:column-width="3.3993in"/>
    </style:style>
    <style:style style:name="Table1.1" style:family="table-row">
      <style:table-row-properties fo:keep-together="auto"/>
    </style:style>
    <style:style style:name="Table1.A1" style:family="table-cell">
      <style:table-cell-properties style:vertical-align="middle" fo:background-color="#e9eef1" fo:padding-left="0.0785in" fo:padding-right="0.075in" fo:padding-top="0in" fo:padding-bottom="0in" fo:border="0.5pt solid #000000">
        <style:background-image/>
      </style:table-cell-properties>
    </style:style>
    <style:style style:name="Table1.A2" style:family="table-cell">
      <style:table-cell-properties fo:padding-left="0.0785in" fo:padding-right="0.075in" fo:padding-top="0in" fo:padding-bottom="0in" fo:border="0.5pt solid #000000"/>
    </style:style>
    <style:style style:name="Table1.B2" style:family="table-cell">
      <style:table-cell-properties fo:padding-left="0.0785in" fo:padding-right="0.075in" fo:padding-top="0in" fo:padding-bottom="0in" fo:border="0.5pt solid #000000"/>
    </style:style>
    <style:style style:name="Table1.A3" style:family="table-cell">
      <style:table-cell-properties fo:padding-left="0.0785in" fo:padding-right="0.075in" fo:padding-top="0in" fo:padding-bottom="0in" fo:border="0.5pt solid #000000"/>
    </style:style>
    <style:style style:name="Table1.B3" style:family="table-cell">
      <style:table-cell-properties fo:padding-left="0.0785in" fo:padding-right="0.075in" fo:padding-top="0in" fo:padding-bottom="0in" fo:border="0.5pt solid #000000"/>
    </style:style>
    <style:style style:name="Table1.A4" style:family="table-cell">
      <style:table-cell-properties fo:padding-left="0.0785in" fo:padding-right="0.075in" fo:padding-top="0in" fo:padding-bottom="0in" fo:border="0.5pt solid #000000"/>
    </style:style>
    <style:style style:name="Table1.B4" style:family="table-cell">
      <style:table-cell-properties fo:padding-left="0.0785in" fo:padding-right="0.075in" fo:padding-top="0in" fo:padding-bottom="0in" fo:border="0.5pt solid #000000"/>
    </style:style>
    <style:style style:name="Table1.A5" style:family="table-cell">
      <style:table-cell-properties fo:padding-left="0.0785in" fo:padding-right="0.075in" fo:padding-top="0in" fo:padding-bottom="0in" fo:border="0.5pt solid #000000"/>
    </style:style>
    <style:style style:name="Table1.B5" style:family="table-cell">
      <style:table-cell-properties fo:padding-left="0.0785in" fo:padding-right="0.075in" fo:padding-top="0in" fo:padding-bottom="0in" fo:border="0.5pt solid #000000"/>
    </style:style>
    <style:style style:name="Table1.A6" style:family="table-cell">
      <style:table-cell-properties fo:padding-left="0.0785in" fo:padding-right="0.075in" fo:padding-top="0in" fo:padding-bottom="0in" fo:border="0.5pt solid #000000"/>
    </style:style>
    <style:style style:name="Table1.B6" style:family="table-cell">
      <style:table-cell-properties fo:padding-left="0.0785in" fo:padding-right="0.075in" fo:padding-top="0in" fo:padding-bottom="0in" fo:border="0.5pt solid #000000"/>
    </style:style>
    <style:style style:name="Table1.A7" style:family="table-cell">
      <style:table-cell-properties fo:padding-left="0.0785in" fo:padding-right="0.075in" fo:padding-top="0in" fo:padding-bottom="0in" fo:border="0.5pt solid #000000"/>
    </style:style>
    <style:style style:name="Table1.B7" style:family="table-cell">
      <style:table-cell-properties fo:padding-left="0.0785in" fo:padding-right="0.075in" fo:padding-top="0in" fo:padding-bottom="0in" fo:border="0.5pt solid #000000"/>
    </style:style>
    <style:style style:name="P1" style:family="paragraph" style:parent-style-name="Standard">
      <style:paragraph-properties fo:line-height="100%"/>
      <style:text-properties style:font-name="Times New Roman" fo:font-size="14pt" style:font-name-asian="Times New Roman1" style:font-size-asian="14pt" style:font-name-complex="Times New Roman1" style:font-size-complex="14pt" fo:background-color="#ffffff"/>
    </style:style>
    <style:style style:name="P2" style:family="paragraph" style:parent-style-name="Standard">
      <style:paragraph-properties fo:line-height="100%"/>
      <style:text-properties style:font-name="Times New Roman" fo:font-size="14pt" fo:font-weight="bold" style:font-name-asian="Times New Roman1" style:font-size-asian="14pt" style:font-weight-asian="bold" style:font-name-complex="Times New Roman1" style:font-size-complex="14pt" style:font-weight-complex="bold" fo:background-color="#ffffff"/>
    </style:style>
    <style:style style:name="P3" style:family="paragraph" style:parent-style-name="Standard">
      <style:paragraph-properties fo:line-height="100%"/>
    </style:style>
    <style:style style:name="P4" style:family="paragraph" style:parent-style-name="Standard">
      <style:paragraph-properties fo:line-height="100%"/>
      <style:text-properties fo:font-variant="small-caps" style:font-name="Times New Roman" fo:font-size="14pt" fo:font-weight="bold" style:font-name-asian="Times New Roman1" style:font-size-asian="14pt" style:font-weight-asian="bold" style:font-name-complex="Times New Roman1" style:font-size-complex="14pt" style:font-weight-complex="bold" fo:background-color="#ffffff"/>
    </style:style>
    <style:style style:name="P5" style:family="paragraph" style:parent-style-name="Standard">
      <style:paragraph-properties fo:margin-left="0in" fo:margin-right="0in" fo:margin-top="0in" fo:margin-bottom="0.0693in" loext: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small-caps" style:font-name="Times New Roman" fo:font-size="14pt" fo:font-weight="bold" style:font-name-asian="Times New Roman1" style:font-size-asian="14pt" style:font-weight-asian="bold" style:font-name-complex="Times New Roman1" style:font-size-complex="14pt" style:font-weight-complex="bold" fo:background-color="#ffffff"/>
    </style:style>
    <style:style style:name="P6" style:family="paragraph" style:parent-style-name="Standard">
      <style:paragraph-properties fo:margin-left="0in" fo:margin-right="0in" fo:margin-top="0in" fo:margin-bottom="0.0693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7" style:family="paragraph" style:parent-style-name="Standard">
      <style:paragraph-properties fo:margin-left="0in" fo:margin-right="0in" fo:margin-top="0.111in" fo:margin-bottom="0.111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8" style:family="paragraph" style:parent-style-name="Standard">
      <style:paragraph-properties fo:margin-left="0in" fo:margin-right="0in" fo:margin-top="0.111in" fo:margin-bottom="0.111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Times New Roman" fo:font-size="14pt" fo:font-weight="bold" style:font-name-asian="Times New Roman1" style:font-size-asian="14pt" style:font-weight-asian="bold" style:font-name-complex="Times New Roman1" style:font-size-complex="14pt" style:font-weight-complex="bold" fo:background-color="#ffffff"/>
    </style:style>
    <style:style style:name="P9"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P10" style:family="paragraph" style:parent-style-name="Standard" style:list-style-name="WWNum1">
      <style:paragraph-properties fo:margin-left="0.2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1" style:family="paragraph" style:parent-style-name="Standard" style:list-style-name="WWNum1">
      <style:paragraph-properties fo:margin-left="0.25in" fo:margin-right="0in" fo:margin-top="0in" fo:margin-bottom="0.083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 style:family="paragraph" style:parent-style-name="Standard">
      <style:paragraph-properties fo:margin-top="0in" fo:margin-bottom="0.111in" loext:contextual-spacing="false" fo:line-height="100%" fo:padding-left="0in" fo:padding-right="0in" fo:padding-top="0in" fo:padding-bottom="0.0138in" fo:border-left="none" fo:border-right="none" fo:border-top="none" fo:border-bottom="0.99pt solid #78979a"/>
      <style:text-properties style:font-name="Times New Roman" fo:font-size="14pt" style:font-name-asian="Times New Roman1" style:font-size-asian="14pt" style:font-name-complex="Times New Roman1" style:font-size-complex="14pt" fo:background-color="#ffffff"/>
    </style:style>
    <style:style style:name="P13" style:family="paragraph" style:parent-style-name="Standard">
      <style:paragraph-properties fo:margin-top="0.1945in" fo:margin-bottom="0.0835in" loext:contextual-spacing="false" fo:line-height="100%"/>
    </style:style>
    <style:style style:name="P14" style:family="paragraph" style:parent-style-name="Standard">
      <style:paragraph-properties fo:line-height="100%" fo:break-before="page"/>
    </style:style>
    <style:style style:name="P15" style:family="paragraph" style:parent-style-name="Standard" style:master-page-name="Standard">
      <style:paragraph-properties fo:line-height="100%" style:page-number="1"/>
      <style:text-properties style:font-name="Times New Roman" fo:font-size="14pt" style:font-name-asian="Times New Roman1" style:font-size-asian="14pt" style:font-name-complex="Times New Roman1" style:font-size-complex="14pt" fo:background-color="#ffffff"/>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font-weight-complex="bold" fo:background-color="#ffffff"/>
    </style:style>
    <style:style style:name="T2" style:family="text">
      <style:text-properties style:font-name="Times New Roman" fo:font-size="14pt" style:font-name-asian="Times New Roman1" style:font-size-asian="14pt" style:font-name-complex="Times New Roman1" style:font-size-complex="14pt" fo:background-color="#ffffff"/>
    </style:style>
    <style:style style:name="T3" style:family="text">
      <style:text-properties fo:font-variant="small-caps"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fo:background-color="#ffffff"/>
    </style:style>
    <style:style style:name="T4" style:family="text">
      <style:text-properties fo:font-variant="normal" fo:text-transform="none"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fo:background-color="#ffffff"/>
    </style:style>
    <style:style style:name="T5" style:family="text">
      <style:text-properties fo:font-variant="normal" fo:text-transform="none" style:text-line-through-style="none" style:text-line-through-type="none" style:text-position="0% 100%" style:font-name="Times New Roman" fo:font-size="14pt" fo:font-style="normal" style:text-underline-style="none" style:font-name-asian="Times New Roman1" style:font-size-asian="14pt" style:font-style-asian="normal" style:font-name-complex="Times New Roman1" style:font-size-complex="14pt" style:font-style-complex="normal" fo:background-color="#ffffff"/>
    </style:style>
    <style:style style:name="T6" style:family="text">
      <style:text-properties fo:font-variant="normal" fo:text-transform="none" fo:color="#5a636c" style:text-line-through-style="none" style:text-line-through-type="none" style:text-position="0% 100%" style:font-name="Aptos" fo:font-size="8.5pt" fo:font-style="normal" style:text-underline-style="none" fo:font-weight="normal" style:font-name-asian="Aptos1" style:font-size-asian="8.5pt" style:font-style-asian="normal" style:font-weight-asian="normal" style:font-name-complex="Aptos1" style:font-size-complex="8.5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able:table table:name="Table1" table:style-name="Table1">
        <table:table-column table:style-name="Table1.A"/>
        <table:table-column table:style-name="Table1.B"/>
        <table:table-row table:style-name="Table1.1">
          <table:table-cell table:style-name="Table1.A1" office:value-type="string">
            <text:p text:style-name="P3"><text:span text:style-name="T1">Website Page</text:span></text:p>
          </table:table-cell>
          <table:table-cell table:style-name="Table1.A1" office:value-type="string">
            <text:p text:style-name="P3"><text:span text:style-name="T1">Main Content</text:span></text:p>
          </table:table-cell>
        </table:table-row>
        <table:table-row table:style-name="Table1.1">
          <table:table-cell table:style-name="Table1.A2" office:value-type="string">
            <text:p text:style-name="P3"><text:span text:style-name="T2">1. Home Page</text:span></text:p>
          </table:table-cell>
          <table:table-cell table:style-name="Table1.B2" office:value-type="string">
            <text:p text:style-name="P3"><text:span text:style-name="T2">Practice introduction, service overview, concerns addressed, process, and consultation.</text:span></text:p>
          </table:table-cell>
        </table:table-row>
        <table:table-row table:style-name="Table1.1">
          <table:table-cell table:style-name="Table1.A3" office:value-type="string">
            <text:p text:style-name="P3"><text:span text:style-name="T2">2. Assessments</text:span></text:p>
          </table:table-cell>
          <table:table-cell table:style-name="Table1.B3" office:value-type="string">
            <text:p text:style-name="P3"><text:span text:style-name="T2">Assessment purpose, referral questions, neurodivergence education, process, recommendations, and FAQs.</text:span></text:p>
          </table:table-cell>
        </table:table-row>
        <table:table-row table:style-name="Table1.1">
          <table:table-cell table:style-name="Table1.A4" office:value-type="string">
            <text:p text:style-name="P3"><text:span text:style-name="T2">3. Clinicians</text:span></text:p>
          </table:table-cell>
          <table:table-cell table:style-name="Table1.B4" office:value-type="string">
            <text:p text:style-name="P3"><text:span text:style-name="T2">Team introduction, clinician profiles, roles, credentials, and collaborative approach.</text:span></text:p>
          </table:table-cell>
        </table:table-row>
        <table:table-row table:style-name="Table1.1">
          <table:table-cell table:style-name="Table1.A5" office:value-type="string">
            <text:p text:style-name="P3"><text:span text:style-name="T2">4. Psychotherapy</text:span></text:p>
          </table:table-cell>
          <table:table-cell table:style-name="Table1.B5" office:value-type="string">
            <text:p text:style-name="P3"><text:span text:style-name="T2">Concerns addressed, treatment approaches, session process, confidentiality, and FAQs.</text:span></text:p>
          </table:table-cell>
        </table:table-row>
        <table:table-row table:style-name="Table1.1">
          <table:table-cell table:style-name="Table1.A6" office:value-type="string">
            <text:p text:style-name="P3"><text:span text:style-name="T2">5. Education</text:span></text:p>
          </table:table-cell>
          <table:table-cell table:style-name="Table1.B6" office:value-type="string">
            <text:p text:style-name="P3"><text:span text:style-name="T2">Accessible educational content on assessment, neurodivergence, cognition, trauma, and diagnosis.</text:span></text:p>
          </table:table-cell>
        </table:table-row>
        <table:table-row table:style-name="Table1.1">
          <table:table-cell table:style-name="Table1.A7" office:value-type="string">
            <text:p text:style-name="P3"><text:span text:style-name="T2">6. Resources</text:span></text:p>
          </table:table-cell>
          <table:table-cell table:style-name="Table1.B7" office:value-type="string">
            <text:p text:style-name="P3"><text:span text:style-name="T2">Preparation guides, practical information, insurance, crisis supports, privacy, and contact.</text:span></text:p>
          </table:table-cell>
        </table:table-row>
      </table:table>
      <text:p text:style-name="P1"/>
      <text:p text:style-name="P3"><text:span text:style-name="T1">Global age wording: </text:span><text:span text:style-name="T2">Use “children, adolescents, adults, and older adults” or “children through older adulthood” rather than numerical age limits.</text:span></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4"/>
      <text:p text:style-name="P3"><text:span text:style-name="T2">Page 1</text:span></text:p>
      <text:p text:style-name="P3"><text:span text:style-name="T2">Home Page</text:span></text:p>
      <text:p text:style-name="P6"><text:span text:style-name="T3">Thoughtful care. Clear next steps.</text:span></text:p>
      <text:p text:style-name="P3"><text:span text:style-name="T2">Neuropsychological assessment and psychotherapy, centred on understanding.</text:span></text:p>
      <text:p text:style-name="P3"><text:span text:style-name="T2">We provide comprehensive neuropsychological assessments for children, adolescents, adults, and older adults, as well as evidence-based psychotherapy for adults.</text:span></text:p>
      <text:p text:style-name="P3"><text:span text:style-name="T2">Our approach combines careful listening, clinical expertise, and individualized recommendations to help you better understand your concerns and determine meaningful next steps.</text:span></text:p>
      <text:p text:style-name="P7"><text:span text:style-name="T4">Primary button: Book a Free 15-Minute Consultation<text:line-break/>Secondary button: Explore Our Services</text:span></text:p>
      <text:p text:style-name="P7"><text:span text:style-name="T1">Please mention - In Person and Virtual Services are Available (In person for Testing and Assessments. Virtual Services for Therapy) </text:span></text:p>
      <text:p text:style-name="P3"><text:span text:style-name="T1">Understanding begins with listening.</text:span></text:p>
      <text:p text:style-name="P3"><text:span text:style-name="T2">People seek support for many different reasons. You may be concerned about attention, learning, memory, emotional wellbeing, behaviour, trauma, or a change in everyday functioning. You may also be looking for psychotherapy to help you manage distress, understand difficult experiences, and move forward with greater confidence.</text:span></text:p>
      <text:p text:style-name="P3"><text:span text:style-name="T2">We begin by listening carefully to your concerns and helping you identify the service that best fits your needs.</text:span></text:p>
      <text:p text:style-name="P3"><text:span text:style-name="T1">Neuropsychological Assessment</text:span></text:p>
      <text:p text:style-name="P3"><text:span text:style-name="T1">A clearer understanding of strengths and needs.</text:span></text:p>
      <text:p text:style-name="P3"><text:span text:style-name="T2">A neuropsychological assessment provides a detailed understanding of how an individual thinks, learns, remembers, processes information, regulates emotions, and manages everyday demands.</text:span></text:p>
      <text:p text:style-name="P3"><text:span text:style-name="T2">Depending on the referral question, the assessment may include clinical interviews, standardized testing, questionnaires, review of relevant records, feedback, individualized recommendations, and a comprehensive written report.</text:span></text:p>
      <text:p text:style-name="P3"><text:span text:style-name="T2">Assessments are available for children, adolescents, adults, and older adults.</text:span></text:p>
      <text:p text:style-name="P8"/>
      <text:p text:style-name="P8"/>
      <text:p text:style-name="P8"><text:soft-page-break/></text:p>
      <text:p text:style-name="P8"/>
      <text:p text:style-name="P8"/>
      <text:p text:style-name="P7"><text:span text:style-name="T4">Button: Learn About Assessments</text:span></text:p>
      <text:p text:style-name="P3"><text:span text:style-name="T2">Psychotherapy</text:span></text:p>
      <text:p text:style-name="P3"><text:span text:style-name="T2">A collaborative space for meaningful change.</text:span></text:p>
      <text:p text:style-name="P3"><text:span text:style-name="T2">Psychotherapy provides a private and supportive space to understand emotional difficulties, develop practical coping strategies, and work toward meaningful personal goals.</text:span></text:p>
      <text:p text:style-name="P3"><text:span text:style-name="T2">We provide evidence-based psychotherapy for adults experiencing concerns such as anxiety, depression, trauma, post-traumatic stress, grief, stress, burnout, emotional regulation difficulties, relationship concerns, and major life transitions.</text:span></text:p>
      <text:p text:style-name="P3"><text:span text:style-name="T2">Therapy is individualized according to your needs, history, culture, values, and pace.</text:span></text:p>
      <text:p text:style-name="P7"><text:span text:style-name="T4">Button: Learn About Psychotherapy</text:span></text:p>
      <text:p text:style-name="P3"><text:span text:style-name="T2">Areas we may help you explore</text:span></text:p>
      <text:p text:style-name="P3"><text:span text:style-name="T2">Assessment concerns</text:span></text:p>
      <text:list xml:id="list263010472" text:style-name="WWNum1">
        <text:list-item>
          <text:p text:style-name="P10"><text:span text:style-name="T5">Attention and concentration</text:span></text:p>
        </text:list-item>
        <text:list-item>
          <text:p text:style-name="P10"><text:span text:style-name="T5">Learning and academic functioning</text:span></text:p>
        </text:list-item>
        <text:list-item>
          <text:p text:style-name="P10"><text:span text:style-name="T5">Memory and cognitive changes</text:span></text:p>
        </text:list-item>
        <text:list-item>
          <text:p text:style-name="P10"><text:span text:style-name="T5">Developmental concerns</text:span></text:p>
        </text:list-item>
        <text:list-item>
          <text:p text:style-name="P10"><text:span text:style-name="T5">Emotional and behavioural functioning</text:span></text:p>
        </text:list-item>
        <text:list-item>
          <text:p text:style-name="P10"><text:span text:style-name="T5">Medical or neurological conditions</text:span></text:p>
        </text:list-item>
        <text:list-item>
          <text:p text:style-name="P10"><text:span text:style-name="T5">Effects of illness or injury</text:span></text:p>
        </text:list-item>
        <text:list-item>
          <text:p text:style-name="P10"><text:span text:style-name="T5">Diagnostic clarification</text:span></text:p>
        </text:list-item>
        <text:list-item>
          <text:p text:style-name="P10"><text:span text:style-name="T5">Legal or disability-related questions</text:span></text:p>
        </text:list-item>
        <text:list-item>
          <text:p text:style-name="P11"><text:soft-page-break/><text:span text:style-name="T5">Recommendations for school, work, treatment, or daily life</text:span></text:p>
        </text:list-item>
      </text:list>
      <text:p text:style-name="P3"><text:span text:style-name="T2">Psychotherapy concerns</text:span></text:p>
      <text:list xml:id="list51525197953861" text:continue-numbering="true" text:style-name="WWNum1">
        <text:list-item>
          <text:p text:style-name="P10"><text:span text:style-name="T5">Anxiety and persistent worry</text:span></text:p>
        </text:list-item>
        <text:list-item>
          <text:p text:style-name="P10"><text:span text:style-name="T5">Depression and low motivation</text:span></text:p>
        </text:list-item>
        <text:list-item>
          <text:p text:style-name="P10"><text:span text:style-name="T5">Trauma and PTSD</text:span></text:p>
        </text:list-item>
        <text:list-item>
          <text:p text:style-name="P10"><text:span text:style-name="T5">Stress and burnout</text:span></text:p>
        </text:list-item>
        <text:list-item>
          <text:p text:style-name="P10"><text:span text:style-name="T5">Grief and loss</text:span></text:p>
        </text:list-item>
        <text:list-item>
          <text:p text:style-name="P10"><text:span text:style-name="T5">Anger and emotional regulation</text:span></text:p>
        </text:list-item>
        <text:list-item>
          <text:p text:style-name="P10"><text:span text:style-name="T5">Self-esteem and identity</text:span></text:p>
        </text:list-item>
        <text:list-item>
          <text:p text:style-name="P10"><text:span text:style-name="T5">Relationship difficulties</text:span></text:p>
        </text:list-item>
        <text:list-item>
          <text:p text:style-name="P10"><text:span text:style-name="T5">Adjustment to illness or injury</text:span></text:p>
        </text:list-item>
        <text:list-item>
          <text:p text:style-name="P11"><text:span text:style-name="T5">Major life and career transitions</text:span></text:p>
        </text:list-item>
      </text:list>
      <text:p text:style-name="P2"/>
      <text:p text:style-name="P2"/>
      <text:p text:style-name="P3"><text:span text:style-name="T1">How to begin</text:span></text:p>
      <text:p text:style-name="P3"><text:span text:style-name="T2">01 — Start with a conversation</text:span></text:p>
      <text:p text:style-name="P3"><text:span text:style-name="T2">Book a complimentary 15-minute consultation to briefly discuss what you are looking for and ask questions about our services.</text:span></text:p>
      <text:p text:style-name="P3"><text:span text:style-name="T2">02 — Clarify the appropriate service</text:span></text:p>
      <text:p text:style-name="P3"><text:span text:style-name="T2">We will help you consider whether neuropsychological assessment, psychotherapy, or another form of support may be the most appropriate next step.</text:span></text:p>
      <text:p text:style-name="P3"><text:span text:style-name="T2">03 — Receive individualized care</text:span></text:p>
      <text:p text:style-name="P3"><text:span text:style-name="T2">Your assessment or psychotherapy service will be shaped around your concerns, goals, circumstances, and clinical needs.</text:span></text:p>
      <text:p text:style-name="P1"><text:soft-page-break/></text:p>
      <text:p text:style-name="P3"><text:span text:style-name="T1">Care can be both rigorous and compassionate.</text:span></text:p>
      <text:p text:style-name="P3"><text:span text:style-name="T2">We believe that effective care begins with careful listening. Our goal is to provide services that are professional, evidence-informed, respectful, and understandable.</text:span></text:p>
      <text:p text:style-name="P3"><text:span text:style-name="T2">Whether you are seeking diagnostic clarity, practical recommendations, emotional support, or a better understanding of yourself or a family member, we aim to make the process as clear and comfortable as possible.</text:span></text:p>
      <text:p text:style-name="P3"><text:span text:style-name="T1">Begin with a conversation</text:span></text:p>
      <text:p text:style-name="P3"><text:span text:style-name="T1">Not sure whether assessment or psychotherapy is right for you?</text:span></text:p>
      <text:p text:style-name="P3"><text:span text:style-name="T2">A complimentary 15-minute consultation allows you to briefly explain what brings you here, ask practical questions, and learn about possible next steps.</text:span></text:p>
      <text:p text:style-name="P7"><text:span text:style-name="T4">Primary button: Book a Free 15-Minute Consultation</text:span></text:p>
      <text:p text:style-name="P3"><text:span text:style-name="T2">Footer contact block</text:span></text:p>
      <text:p text:style-name="P3"><text:span text:style-name="T2">Neuropsychological assessments for children through older adulthood and evidence-based psychotherapy for adults.</text:span></text:p>
      <text:p text:style-name="P3"><text:span text:style-name="T2">Phone or text: 705-321-8146</text:span></text:p>
      <text:p text:style-name="P3"><text:span text:style-name="T2">Email: drsauriolassociates@neuropsychologicalassessments.com</text:span></text:p>
      <text:p text:style-name="P3"><text:span text:style-name="T2">Please avoid including sensitive personal or health information in email or text messages.</text:span></text:p>
      <text:p text:style-name="P1"/>
      <text:p text:style-name="P6"><text:span text:style-name="T3">PAGE 2</text:span></text:p>
      <text:p text:style-name="P3"><text:span text:style-name="T2">Assessments</text:span></text:p>
      <text:p text:style-name="P12"/>
      <text:p text:style-name="P6"><text:span text:style-name="T3">Thoughtful care. Clear next steps.</text:span></text:p>
      <text:p text:style-name="P3"><text:span text:style-name="T2">Neuropsychological Assessments</text:span></text:p>
      <text:p text:style-name="P3"><text:span text:style-name="T2">Understanding how you think, learn, remember, and function.</text:span></text:p>
      <text:p text:style-name="P3"><text:span text:style-name="T2">A neuropsychological assessment provides an in-depth understanding of cognitive, emotional, behavioural, and everyday functioning.</text:span></text:p>
      <text:p text:style-name="P3"><text:soft-page-break/><text:span text:style-name="T2">Through clinical interviews, standardized testing, questionnaires, and a review of relevant background information, we work to identify patterns of strengths and areas where additional support may be helpful.</text:span></text:p>
      <text:p text:style-name="P3"><text:span text:style-name="T2">The purpose of an assessment is not simply to identify difficulties. It is to develop a clearer and more complete understanding of the individual and provide practical recommendations for home, school, work, healthcare, or daily life.</text:span></text:p>
      <text:p text:style-name="P7"><text:span text:style-name="T4">Primary button: Book a Free 15-Minute Consultation<text:line-break/>Secondary button: Ask About an Assessment</text:span></text:p>
      <text:p text:style-name="P3"><text:span text:style-name="T2">What is a neuropsychological assessment?</text:span></text:p>
      <text:p text:style-name="P3"><text:span text:style-name="T2">A neuropsychological assessment examines how different areas of thinking and behaviour are functioning.</text:span></text:p>
      <text:p text:style-name="P3"><text:span text:style-name="T2">Depending on the referral question, an assessment may explore:</text:span></text:p>
      <text:list xml:id="list51526494760957" text:continue-numbering="true" text:style-name="WWNum1">
        <text:list-item>
          <text:p text:style-name="P10"><text:span text:style-name="T5">Attention and concentration</text:span></text:p>
        </text:list-item>
        <text:list-item>
          <text:p text:style-name="P10"><text:span text:style-name="T5">Learning and memory</text:span></text:p>
        </text:list-item>
        <text:list-item>
          <text:p text:style-name="P10"><text:span text:style-name="T5">Language and communication</text:span></text:p>
        </text:list-item>
        <text:list-item>
          <text:p text:style-name="P10"><text:span text:style-name="T5">Visual and spatial abilities</text:span></text:p>
        </text:list-item>
        <text:list-item>
          <text:p text:style-name="P10"><text:span text:style-name="T5">Processing speed</text:span></text:p>
        </text:list-item>
        <text:list-item>
          <text:p text:style-name="P10"><text:span text:style-name="T5">Reasoning and problem-solving</text:span></text:p>
        </text:list-item>
        <text:list-item>
          <text:p text:style-name="P10"><text:span text:style-name="T5">Planning and organization</text:span></text:p>
        </text:list-item>
        <text:list-item>
          <text:p text:style-name="P10"><text:span text:style-name="T5">Academic skills</text:span></text:p>
        </text:list-item>
        <text:list-item>
          <text:p text:style-name="P10"><text:span text:style-name="T5">Emotional and behavioural functioning</text:span></text:p>
        </text:list-item>
        <text:list-item>
          <text:p text:style-name="P11"><text:span text:style-name="T5">Adaptive and everyday living skills</text:span></text:p>
        </text:list-item>
      </text:list>
      <text:p text:style-name="P3"><text:span text:style-name="T2">Results are interpreted in the context of the individual’s developmental, educational, medical, psychological, social, and cultural background.</text:span></text:p>
      <text:p text:style-name="P2"/>
      <text:p text:style-name="P2"/>
      <text:p text:style-name="P2"/>
      <text:p text:style-name="P3"><text:span text:style-name="T1">Reasons for seeking an assessment</text:span></text:p>
      <text:p text:style-name="P3"><text:soft-page-break/><text:span text:style-name="T1">Attention and executive functioning</text:span></text:p>
      <text:p text:style-name="P3"><text:span text:style-name="T2">Difficulties with concentration, organization, planning, task completion, time management, impulsivity, or managing multiple responsibilities.</text:span></text:p>
      <text:p text:style-name="P3"><text:span text:style-name="T1">Learning and academic performance</text:span></text:p>
      <text:p text:style-name="P3"><text:span text:style-name="T2">Persistent challenges involving reading, writing, mathematics, comprehension, studying, or retaining newly learned information.</text:span></text:p>
      <text:p text:style-name="P3"><text:span text:style-name="T1">Memory and cognitive changes</text:span></text:p>
      <text:p text:style-name="P3"><text:span text:style-name="T2">Concerns about forgetfulness, confusion, reduced mental efficiency, difficulty finding words, or changes in everyday functioning.</text:span></text:p>
      <text:p text:style-name="P3"><text:span text:style-name="T1">Developmental differences</text:span></text:p>
      <text:p text:style-name="P3"><text:span text:style-name="T2">Questions about developmental progress, communication, behaviour, social functioning, adaptive skills, or differences in how a person learns and processes information.</text:span></text:p>
      <text:p text:style-name="P3"><text:span text:style-name="T1">Medical or neurological conditions</text:span></text:p>
      <text:p text:style-name="P3"><text:span text:style-name="T2">Changes associated with a neurological condition, medical illness, brain injury, stroke, epilepsy, cancer treatment, chronic illness, or another health-related concern.</text:span></text:p>
      <text:p text:style-name="P3"><text:span text:style-name="T1">Emotional and behavioural functioning</text:span></text:p>
      <text:p text:style-name="P3"><text:span text:style-name="T2">Concerns involving anxiety, mood, emotional regulation, behaviour, motivation, or the interaction between emotional wellbeing and cognitive performance.</text:span></text:p>
      <text:p text:style-name="P3"><text:span text:style-name="T1">Diagnostic clarification</text:span></text:p>
      <text:p text:style-name="P3"><text:span text:style-name="T2">A need to better understand whether an individual’s difficulties may be associated with ADHD, a learning disorder, an intellectual or developmental condition, a neurocognitive disorder, or another psychological or neurological concern.</text:span></text:p>
      <text:p text:style-name="P3"><text:span text:style-name="T1">Planning and recommendations</text:span></text:p>
      <text:p text:style-name="P3"><text:span text:style-name="T2">A need for individualized recommendations related to school, postsecondary education, employment, treatment, rehabilitation, independent living, or other supports.</text:span></text:p>
      <text:p text:style-name="P3"><text:span text:style-name="T1">Understanding neurodivergent conditions</text:span></text:p>
      <text:p text:style-name="P3"><text:span text:style-name="T1">Different minds process the world in different ways.</text:span></text:p>
      <text:p text:style-name="P3"><text:span text:style-name="T2">Neurodiversity recognizes that there is natural variation in how people think, learn, communicate, focus, regulate emotions, and experience their environments.</text:span></text:p>
      <text:p text:style-name="P3"><text:span text:style-name="T2">The term neurodivergent is commonly used to describe individuals whose neurological development or cognitive functioning differs from what is considered typical. This may include individuals with:</text:span></text:p>
      <text:list xml:id="list51526465051672" text:continue-numbering="true" text:style-name="WWNum1">
        <text:list-item>
          <text:p text:style-name="P10"><text:span text:style-name="T5">Attention-deficit/hyperactivity disorder, or ADHD</text:span></text:p>
        </text:list-item>
        <text:list-item>
          <text:p text:style-name="P10"><text:soft-page-break/><text:span text:style-name="T5">Autism spectrum disorder</text:span></text:p>
        </text:list-item>
        <text:list-item>
          <text:p text:style-name="P10"><text:span text:style-name="T5">Specific learning disorders</text:span></text:p>
        </text:list-item>
        <text:list-item>
          <text:p text:style-name="P10"><text:span text:style-name="T5">Intellectual or developmental disabilities</text:span></text:p>
        </text:list-item>
        <text:list-item>
          <text:p text:style-name="P10"><text:span text:style-name="T5">Tourette syndrome and tic disorders</text:span></text:p>
        </text:list-item>
        <text:list-item>
          <text:p text:style-name="P10"><text:span text:style-name="T5">Developmental language or communication differences</text:span></text:p>
        </text:list-item>
        <text:list-item>
          <text:p text:style-name="P11"><text:span text:style-name="T5">Other cognitive or sensory-processing differences</text:span></text:p>
        </text:list-item>
      </text:list>
      <text:p text:style-name="P3"><text:span text:style-name="T2">Some people identify strongly with the term neurodivergent, while others prefer diagnostic or person-specific language. We respect each individual’s preferred terminology.</text:span></text:p>
      <text:p text:style-name="P3"><text:span text:style-name="T1">Neurodivergence is not defined only by difficulty.</text:span></text:p>
      <text:p text:style-name="P3"><text:span text:style-name="T2">A neurodivergent person may experience meaningful strengths alongside areas requiring support.</text:span></text:p>
      <text:p text:style-name="P3"><text:span text:style-name="T2">These may include strengths in creativity, focused interests, visual thinking, problem-solving, honesty, pattern recognition, memory for specific information, persistence, or alternative ways of understanding complex ideas.</text:span></text:p>
      <text:p text:style-name="P3"><text:span text:style-name="T2">At the same time, the individual may experience difficulties with attention, sensory demands, transitions, communication, emotional regulation, social expectations, academic tasks, organization, or daily routines.</text:span></text:p>
      <text:p text:style-name="P3"><text:span text:style-name="T2">The goal of assessment is to understand this individual pattern rather than compare the person to a single idea of how everyone should function.</text:span></text:p>
      <text:p text:style-name="P3"><text:span text:style-name="T1">How an assessment may help</text:span></text:p>
      <text:list xml:id="list51525680668503" text:continue-numbering="true" text:style-name="WWNum1">
        <text:list-item>
          <text:p text:style-name="P10"><text:span text:style-name="T5">Identify cognitive and academic strengths</text:span></text:p>
        </text:list-item>
        <text:list-item>
          <text:p text:style-name="P10"><text:span text:style-name="T5">Clarify areas that require support</text:span></text:p>
        </text:list-item>
        <text:list-item>
          <text:p text:style-name="P10"><text:span text:style-name="T5">Explore whether diagnostic criteria are met</text:span></text:p>
        </text:list-item>
        <text:list-item>
          <text:p text:style-name="P10"><text:span text:style-name="T5">Distinguish between conditions with overlapping symptoms</text:span></text:p>
        </text:list-item>
        <text:list-item>
          <text:p text:style-name="P10"><text:span text:style-name="T5">Understand how emotional, developmental, medical, and environmental factors may affect functioning</text:span></text:p>
        </text:list-item>
        <text:list-item>
          <text:p text:style-name="P10"><text:span text:style-name="T5">Explain why certain tasks or environments are especially difficult</text:span></text:p>
        </text:list-item>
        <text:list-item>
          <text:p text:style-name="P10"><text:span text:style-name="T5">Identify strategies that align with the individual’s learning and processing style</text:span></text:p>
        </text:list-item>
        <text:list-item>
          <text:p text:style-name="P10"><text:span text:style-name="T5">Support requests for appropriate accommodations</text:span></text:p>
        </text:list-item>
        <text:list-item>
          <text:p text:style-name="P10"><text:soft-page-break/><text:span text:style-name="T5">Guide educational, vocational, psychological, or medical planning</text:span></text:p>
        </text:list-item>
        <text:list-item>
          <text:p text:style-name="P11"><text:span text:style-name="T5">Improve self-understanding and reduce unhelpful self-blame</text:span></text:p>
        </text:list-item>
      </text:list>
      <text:p text:style-name="P3"><text:span text:style-name="T2">A diagnosis may be one outcome of an assessment, but it is not the only purpose. The broader objective is to provide an accurate and useful understanding of the individual’s functioning.</text:span></text:p>
      <text:p text:style-name="P3"><text:span text:style-name="T1">A neuro-affirming approach</text:span></text:p>
      <text:p text:style-name="P3"><text:span text:style-name="T2">We approach neurodivergent functioning with curiosity, respect, and clinical care.</text:span></text:p>
      <text:p text:style-name="P3"><text:span text:style-name="T2">This means that we seek to understand both the challenges a person experiences and the strengths, adaptations, and perspectives they bring. Recommendations are intended to support functioning and wellbeing without asking the person to suppress important aspects of their identity.</text:span></text:p>
      <text:p text:style-name="P3"><text:span text:style-name="T2">When appropriate, recommendations may address environmental changes, communication preferences, sensory needs, learning strategies, executive-function supports, emotional wellbeing, and self-advocacy.</text:span></text:p>
      <text:p text:style-name="P3"><text:span text:style-name="T1">Who may benefit from an assessment?</text:span></text:p>
      <text:p text:style-name="P3"><text:span text:style-name="T2">We provide neuropsychological assessment services for children, adolescents, adults, and older adults.</text:span></text:p>
      <text:p text:style-name="P3"><text:span text:style-name="T2">Assessments are individualized according to the person’s developmental stage, referral questions, circumstances, and clinical needs.</text:span></text:p>
      <text:p text:style-name="P3"><text:span text:style-name="T1">Children and adolescents</text:span></text:p>
      <text:p text:style-name="P3"><text:span text:style-name="T2">An assessment may be considered when a child or adolescent experiences persistent difficulties with learning, attention, behaviour, development, emotional regulation, memory, or everyday functioning.</text:span></text:p>
      <text:p text:style-name="P3"><text:span text:style-name="T2">Information may be gathered from parents or caregivers, educators, healthcare providers, and available school or medical records.</text:span></text:p>
      <text:p text:style-name="P3"><text:span text:style-name="T2">Recommendations may help families and schools better understand the child’s needs and identify appropriate educational or developmental supports.</text:span></text:p>
      <text:p text:style-name="P3"><text:span text:style-name="T1">Adults</text:span></text:p>
      <text:p text:style-name="P3"><text:span text:style-name="T2">Adults may seek assessment because of longstanding concerns, changing responsibilities, workplace difficulties, questions about ADHD or learning differences, mental health concerns, medical conditions, or a desire for greater self-understanding.</text:span></text:p>
      <text:p text:style-name="P3"><text:span text:style-name="T2">Assessment findings may support treatment planning, workplace or educational accommodations, and strategies for daily functioning.</text:span></text:p>
      <text:p text:style-name="P3"><text:span text:style-name="T1">Older adults</text:span></text:p>
      <text:p text:style-name="P3"><text:span text:style-name="T2">Assessment may help clarify changes in memory, attention, language, reasoning, or independent functioning.</text:span></text:p>
      <text:p text:style-name="P3"><text:span text:style-name="T2">The evaluation considers possible neurological, medical, psychological, developmental, and situational factors. Findings may help guide healthcare planning, identify appropriate supports, and establish a baseline for future comparison when clinically appropriate.</text:span></text:p>
      <text:p text:style-name="P1"/>
      <text:p text:style-name="P3"><text:soft-page-break/><text:span text:style-name="T1">What does the assessment process involve?</text:span></text:p>
      <text:p text:style-name="P3"><text:span text:style-name="T2">0</text:span><text:span text:style-name="T1">1 — Initial consultation</text:span></text:p>
      <text:p text:style-name="P3"><text:span text:style-name="T2">We begin with a brief consultation to understand the reason for the referral and determine whether our services are appropriate for the questions being asked.</text:span></text:p>
      <text:p text:style-name="P3"><text:span text:style-name="T1">02 — Clinical interview</text:span></text:p>
      <text:p text:style-name="P3"><text:span text:style-name="T2">A detailed interview is completed to gather information about current concerns, developmental history, education, employment, medical history, emotional wellbeing, and everyday functioning. For children, adolescents, or adults who require additional support, a parent, caregiver, or other knowledgeable person may also participate.</text:span></text:p>
      <text:p text:style-name="P3"><text:span text:style-name="T1">03 — Review of relevant information</text:span></text:p>
      <text:p text:style-name="P3"><text:span text:style-name="T2">With appropriate consent, we may review available school records, medical information, previous assessments, treatment records, or other documents relevant to the referral.</text:span></text:p>
      <text:p text:style-name="P3"><text:span text:style-name="T1">04 — Standardized testing</text:span></text:p>
      <text:p text:style-name="P3"><text:span text:style-name="T2">Testing activities are selected according to the referral question and the individual’s age and needs. Tasks may involve answering questions, solving problems, remembering information, working with visual materials, reading, writing, or completing questionnaires. Testing may occur over one or more appointments.</text:span></text:p>
      <text:p text:style-name="P3"><text:span text:style-name="T1">05 — Scoring and clinical interpretation</text:span></text:p>
      <text:p text:style-name="P3"><text:span text:style-name="T2">Test results are scored and interpreted alongside the individual’s history, reported concerns, observed approach to tasks, and other available information. No individual score is interpreted in isolation.</text:span></text:p>
      <text:p text:style-name="P3"><text:span text:style-name="T1">06 — Feedback appointment</text:span></text:p>
      <text:p text:style-name="P3"><text:span text:style-name="T2">The findings are explained in clear and accessible language. The feedback session provides an opportunity to discuss the results, ask questions, and review recommendations.</text:span></text:p>
      <text:p text:style-name="P3"><text:span text:style-name="T1">07 — Written report</text:span></text:p>
      <text:p text:style-name="P3"><text:span text:style-name="T2">When included in the service, a written report summarizes the referral question, relevant background, assessment findings, clinical impressions, and individualized recommendations.</text:span></text:p>
      <text:p text:style-name="P1"/>
      <text:p text:style-name="P1"/>
      <text:p text:style-name="P3"><text:span text:style-name="T1">What may be included in the recommendations?</text:span></text:p>
      <text:p text:style-name="P3"><text:span text:style-name="T2">Recommendations depend on the assessment findings and the individual’s circumstances.</text:span></text:p>
      <text:list xml:id="list51525593883712" text:continue-numbering="true" text:style-name="WWNum1">
        <text:list-item>
          <text:p text:style-name="P10"><text:span text:style-name="T5">School or postsecondary accommodations</text:span></text:p>
        </text:list-item>
        <text:list-item>
          <text:p text:style-name="P10"><text:span text:style-name="T5">Workplace strategies or accommodations</text:span></text:p>
        </text:list-item>
        <text:list-item>
          <text:p text:style-name="P10"><text:soft-page-break/><text:span text:style-name="T5">Attention and executive-function supports</text:span></text:p>
        </text:list-item>
        <text:list-item>
          <text:p text:style-name="P10"><text:span text:style-name="T5">Learning and memory strategies</text:span></text:p>
        </text:list-item>
        <text:list-item>
          <text:p text:style-name="P10"><text:span text:style-name="T5">Environmental or sensory modifications</text:span></text:p>
        </text:list-item>
        <text:list-item>
          <text:p text:style-name="P10"><text:span text:style-name="T5">Psychotherapy or behavioural supports</text:span></text:p>
        </text:list-item>
        <text:list-item>
          <text:p text:style-name="P10"><text:span text:style-name="T5">Medical or allied-health follow-up</text:span></text:p>
        </text:list-item>
        <text:list-item>
          <text:p text:style-name="P10"><text:span text:style-name="T5">Communication strategies</text:span></text:p>
        </text:list-item>
        <text:list-item>
          <text:p text:style-name="P10"><text:span text:style-name="T5">Daily-living and organizational supports</text:span></text:p>
        </text:list-item>
        <text:list-item>
          <text:p text:style-name="P10"><text:span text:style-name="T5">Caregiver or family education</text:span></text:p>
        </text:list-item>
        <text:list-item>
          <text:p text:style-name="P10"><text:span text:style-name="T5">Community resources</text:span></text:p>
        </text:list-item>
        <text:list-item>
          <text:p text:style-name="P11"><text:span text:style-name="T5">Strategies for building on identified strengths</text:span></text:p>
        </text:list-item>
      </text:list>
      <text:p text:style-name="P3"><text:span text:style-name="T2">Recommendations are individualized rather than selected from a standard package.</text:span></text:p>
      <text:p text:style-name="P3"><text:span text:style-name="T1">Frequently asked questions</text:span></text:p>
      <text:p text:style-name="P3"><text:span text:style-name="T1">Do I need a referral?</text:span></text:p>
      <text:p text:style-name="P3"><text:span text:style-name="T2">A physician’s referral may not always be required to contact the practice. However, a referral may be requested in certain circumstances or by an insurance provider, school, employer, or other third party. Please contact us to discuss your specific situation.</text:span></text:p>
      <text:p text:style-name="P3"><text:span text:style-name="T1">Does an assessment guarantee a diagnosis?</text:span></text:p>
      <text:p text:style-name="P3"><text:span text:style-name="T2">No. An assessment determines whether the available information and findings support a particular diagnosis. Sometimes the findings indicate that diagnostic criteria are not met, that additional information is needed, or that another explanation better accounts for the person’s concerns.</text:span></text:p>
      <text:p text:style-name="P3"><text:span text:style-name="T1">How long does an assessment take?</text:span></text:p>
      <text:p text:style-name="P3"><text:span text:style-name="T2">The length of the assessment depends on the referral question, the individual’s developmental stage, the complexity of the concerns, and the amount of testing required. The expected process, appointments, fees, and timeline will be discussed before the assessment begins.</text:span></text:p>
      <text:p text:style-name="P3"><text:span text:style-name="T1">Can accommodations be recommended?</text:span></text:p>
      <text:p text:style-name="P3"><text:span text:style-name="T2">When supported by the findings, the report may include recommendations for academic, workplace, or everyday accommodations. The final decision about whether accommodations are approved is made by the school, employer, licensing body, government program, or other receiving organization.</text:span></text:p>
      <text:p text:style-name="P2"/>
      <text:p text:style-name="P3"><text:soft-page-break/><text:span text:style-name="T1">Can family members participate?</text:span></text:p>
      <text:p text:style-name="P3"><text:span text:style-name="T2">For children and adolescents, parent or caregiver involvement is generally an important part of the process. For adults, a family member or other knowledgeable person may sometimes contribute information with the individual’s consent.</text:span></text:p>
      <text:p text:style-name="P2"/>
      <text:p text:style-name="P3"><text:span text:style-name="T1">Will the assessment be confidential?</text:span></text:p>
      <text:p text:style-name="P3"><text:span text:style-name="T2">Assessment information is handled in accordance with applicable professional, ethical, and privacy requirements. Before services begin, the limits of confidentiality and any circumstances involving third-party referrals will be explained.</text:span></text:p>
      <text:p text:style-name="P3"><text:span text:style-name="T1">Are assessment fees covered by insurance?</text:span></text:p>
      <text:p text:style-name="P3"><text:span text:style-name="T2">Some extended health-benefit plans provide coverage for psychological assessment services. Coverage varies by insurer and policy. Clients are encouraged to contact their insurance provider directly to confirm eligibility, annual limits, referral requirements, and the professional credentials required for reimbursement.</text:span></text:p>
      <text:p text:style-name="P3"><text:span text:style-name="T1">Wondering whether an assessment is appropriate?</text:span></text:p>
      <text:p text:style-name="P3"><text:span text:style-name="T2">You do not need to know exactly which type of assessment you require before contacting us.</text:span></text:p>
      <text:p text:style-name="P3"><text:span text:style-name="T2">During a complimentary 15-minute consultation, you can briefly describe your concerns, ask questions about the process, and discuss whether an assessment through our practice may be an appropriate next step.</text:span></text:p>
      <text:p text:style-name="P7"><text:span text:style-name="T4">Primary button: Book a Free 15-Minute Consultation</text:span></text:p>
      <text:p text:style-name="P3"><text:span text:style-name="T2">Important note</text:span></text:p>
      <text:p text:style-name="P3"><text:span text:style-name="T2">Information on this website is provided for general educational purposes and does not constitute a diagnosis, psychological opinion, or substitute for individualized assessment or treatment.</text:span></text:p>
      <text:p text:style-name="P13"><text:span text:style-name="T1">Suggested global footer: </text:span><text:span text:style-name="T2">Neuropsychological assessments for children through older adulthood and evidence-based psychotherapy for adults.</text:span></text:p>
      <text:p text:style-name="P1"/>
      <text:p text:style-name="P6"><text:span text:style-name="T3">PAGE 3</text:span></text:p>
      <text:p text:style-name="P3"><text:span text:style-name="T2">Clinicians</text:span></text:p>
      <text:p text:style-name="P12"/>
      <text:p text:style-name="P3"><text:span text:style-name="T2">Experienced care. A collaborative approach.</text:span></text:p>
      <text:p text:style-name="P3"><text:span text:style-name="T2">Our clinicians bring complementary experience in neuropsychological assessment, psychotherapy, mental health, and person-centred care. We are committed to providing services that are thoughtful, evidence-informed, respectful, and clearly explained.</text:span></text:p>
      <text:p text:style-name="P3"><text:span text:style-name="T2">Each service is provided within the clinician’s professional role and scope of practice. When collaboration or supervision is part of the service, this will be explained before care begins.</text:span></text:p>
      <text:p text:style-name="P3"><text:soft-page-break/><text:span text:style-name="T1">Dr. Sylvie Sauriol, Psy.D. NeuroPsychologist </text:span></text:p>
      <text:p text:style-name="P3"><text:span text:style-name="T2">Dr. Sylvie Sauriol is a psychologist with 20 years of experience in neuropsychological assessment. Her work focuses on understanding the relationship between cognitive functioning, emotional wellbeing, developmental history, medical factors, and everyday functioning.</text:span></text:p>
      <text:p text:style-name="P3"><text:span text:style-name="T2">Dr. Sauriol provides comprehensive assessments for children, adolescents, adults, and older adults. She works with individuals and families seeking greater clarity regarding attention, learning, memory, developmental differences, emotional and behavioural functioning, neurological or medical conditions, and changes in cognitive functioning.</text:span></text:p>
      <text:p text:style-name="P3"><text:span text:style-name="T2">Her approach emphasizes careful clinical interpretation, clear communication, and practical recommendations. Assessment findings are considered within the individual’s broader life context rather than interpreted as isolated test scores.</text:span></text:p>
      <text:p text:style-name="P3"><text:span text:style-name="T2">Areas of professional focus</text:span></text:p>
      <text:list xml:id="list51525160068658" text:continue-numbering="true" text:style-name="WWNum1">
        <text:list-item>
          <text:p text:style-name="P10"><text:span text:style-name="T5">Comprehensive neuropsychological assessment</text:span></text:p>
        </text:list-item>
        <text:list-item>
          <text:p text:style-name="P10"><text:span text:style-name="T5">Attention and executive functioning</text:span></text:p>
        </text:list-item>
        <text:list-item>
          <text:p text:style-name="P10"><text:span text:style-name="T5">Learning and academic concerns</text:span></text:p>
        </text:list-item>
        <text:list-item>
          <text:p text:style-name="P10"><text:span text:style-name="T5">Developmental and neurodivergent conditions</text:span></text:p>
        </text:list-item>
        <text:list-item>
          <text:p text:style-name="P10"><text:span text:style-name="T5">Memory and cognitive changes</text:span></text:p>
        </text:list-item>
        <text:list-item>
          <text:p text:style-name="P10"><text:span text:style-name="T5">Medical and neurological conditions</text:span></text:p>
        </text:list-item>
        <text:list-item>
          <text:p text:style-name="P10"><text:span text:style-name="T5">Emotional and behavioural functioning</text:span></text:p>
        </text:list-item>
        <text:list-item>
          <text:p text:style-name="P10"><text:span text:style-name="T5">Diagnostic clarification</text:span></text:p>
        </text:list-item>
        <text:list-item>
          <text:p text:style-name="P11"><text:span text:style-name="T5">Individualized recommendations for school, work, treatment, and daily life</text:span></text:p>
        </text:list-item>
      </text:list>
      <text:p text:style-name="P3"><text:span text:style-name="T1">Sebastian Jose, MPsy, MTh, RPQ</text:span></text:p>
      <text:p text:style-name="P3"><text:span text:style-name="T2">Sebastian Jose is a Registered Psychotherapist (Qualifying) who provides psychotherapy for adults and contributes to neuropsychological assessment services within his professional role and under appropriate supervision.</text:span></text:p>
      <text:p text:style-name="P3"><text:span text:style-name="T2">His psychotherapy work is collaborative, trauma-informed, and individualized. He supports adults experiencing anxiety, depression, trauma-related symptoms, grief, stress, burnout, emotional regulation difficulties, relationship concerns, identity questions, and major life transitions.</text:span></text:p>
      <text:p text:style-name="P3"><text:span text:style-name="T2">Sebastian draws from evidence-informed approaches including cognitive behavioural therapy, cognitive processing therapy, attachment-informed therapy, schema-informed work, and practical emotion-regulation strategies. His background in psychology, psychotherapy, and spiritual care supports a whole-person approach that respects each client’s values, culture, beliefs, and lived experience.</text:span></text:p>
      <text:p text:style-name="P3"><text:span text:style-name="T2">Areas of professional focus</text:span></text:p>
      <text:list xml:id="list51526810254441" text:continue-numbering="true" text:style-name="WWNum1">
        <text:list-item>
          <text:p text:style-name="P10"><text:span text:style-name="T5">Anxiety and persistent worry</text:span></text:p>
        </text:list-item>
        <text:list-item>
          <text:p text:style-name="P10"><text:span text:style-name="T5">Depression and reduced motivation</text:span></text:p>
        </text:list-item>
        <text:list-item>
          <text:p text:style-name="P10"><text:soft-page-break/><text:span text:style-name="T5">Trauma and post-traumatic stress</text:span></text:p>
        </text:list-item>
        <text:list-item>
          <text:p text:style-name="P10"><text:span text:style-name="T5">Grief, loss, and adjustment</text:span></text:p>
        </text:list-item>
        <text:list-item>
          <text:p text:style-name="P10"><text:span text:style-name="T5">Stress and occupational burnout</text:span></text:p>
        </text:list-item>
        <text:list-item>
          <text:p text:style-name="P10"><text:span text:style-name="T5">Anger and emotional regulation</text:span></text:p>
        </text:list-item>
        <text:list-item>
          <text:p text:style-name="P10"><text:span text:style-name="T5">Attachment and relationship concerns</text:span></text:p>
        </text:list-item>
        <text:list-item>
          <text:p text:style-name="P10"><text:span text:style-name="T5">Self-esteem, identity, and life transitions</text:span></text:p>
        </text:list-item>
        <text:list-item>
          <text:p text:style-name="P11"><text:span text:style-name="T5">Adjustment to illness, injury, or changes in functioning</text:span></text:p>
        </text:list-item>
      </text:list>
      <text:p text:style-name="P3"><text:span text:style-name="T2">Our collaborative approach</text:span></text:p>
      <text:p text:style-name="P3"><text:span text:style-name="T2">Good care depends on a clear understanding of the question being asked. We take time to identify the purpose of the service, explain the process, and help clients understand what to expect.</text:span></text:p>
      <text:p text:style-name="P3"><text:span text:style-name="T2">When clinically appropriate and with consent, collaboration may include family members, physicians, schools, rehabilitation providers, or other professionals involved in the individual’s care.</text:span></text:p>
      <text:p text:style-name="P3"><text:span text:style-name="T2">We aim to communicate in language that is accurate, accessible, and useful. Our goal is not only to describe concerns, but also to identify strengths, practical supports, and meaningful next steps.</text:span></text:p>
      <text:p text:style-name="P3"><text:span text:style-name="T2">Finding the right clinician</text:span></text:p>
      <text:p text:style-name="P3"><text:span text:style-name="T2">A complimentary 15-minute consultation can help determine which clinician and service may be most appropriate for your needs. The consultation also provides an opportunity to ask about availability, fees, service format, and the next steps in beginning care.</text:span></text:p>
      <text:p text:style-name="P8"/>
      <text:p text:style-name="P7"><text:span text:style-name="T4">Primary button: Book a Free 15-Minute Consultation</text:span></text:p>
      <text:p text:style-name="P5"/>
      <text:p text:style-name="P6"><text:span text:style-name="T3">PAGE 4</text:span></text:p>
      <text:p text:style-name="P3"><text:span text:style-name="T2">Psychotherapy</text:span></text:p>
      <text:p text:style-name="P12"/>
      <text:p text:style-name="P3"><text:span text:style-name="T2">Change can begin with being understood.</text:span></text:p>
      <text:p text:style-name="P3"><text:span text:style-name="T2">Psychotherapy offers a private and collaborative space to understand emotional difficulties, process challenging experiences, develop practical coping strategies, and work toward meaningful change.</text:span></text:p>
      <text:p text:style-name="P3"><text:soft-page-break/><text:span text:style-name="T2">We provide evidence-based, trauma-informed psychotherapy for adults. Therapy is adapted to the client’s needs, history, culture, values, strengths, and pace.</text:span></text:p>
      <text:p text:style-name="P7"><text:span text:style-name="T4">Primary button: Book a Free 15-Minute Consultation<text:line-break/>Secondary button: Ask About Psychotherapy</text:span></text:p>
      <text:p text:style-name="P3"><text:span text:style-name="T2">What can psychotherapy help with?</text:span></text:p>
      <text:p text:style-name="P3"><text:span text:style-name="T2">People seek therapy for many reasons. Some are coping with a recent crisis or transition, while others want to understand longstanding patterns that continue to affect their wellbeing, relationships, or sense of self.</text:span></text:p>
      <text:list xml:id="list51525797839513" text:continue-numbering="true" text:style-name="WWNum1">
        <text:list-item>
          <text:p text:style-name="P10"><text:span text:style-name="T5">Anxiety, worry, fear, or panic</text:span></text:p>
        </text:list-item>
        <text:list-item>
          <text:p text:style-name="P10"><text:span text:style-name="T5">Depression, low mood, or loss of motivation</text:span></text:p>
        </text:list-item>
        <text:list-item>
          <text:p text:style-name="P10"><text:span text:style-name="T5">Trauma and post-traumatic stress</text:span></text:p>
        </text:list-item>
        <text:list-item>
          <text:p text:style-name="P10"><text:span text:style-name="T5">Grief, bereavement, and complicated loss</text:span></text:p>
        </text:list-item>
        <text:list-item>
          <text:p text:style-name="P10"><text:span text:style-name="T5">Stress, occupational pressure, and burnout</text:span></text:p>
        </text:list-item>
        <text:list-item>
          <text:p text:style-name="P10"><text:span text:style-name="T5">Anger and emotional regulation</text:span></text:p>
        </text:list-item>
        <text:list-item>
          <text:p text:style-name="P10"><text:span text:style-name="T5">Relationship and attachment concerns</text:span></text:p>
        </text:list-item>
        <text:list-item>
          <text:p text:style-name="P10"><text:span text:style-name="T5">Low self-esteem, shame, or self-criticism</text:span></text:p>
        </text:list-item>
        <text:list-item>
          <text:p text:style-name="P10"><text:span text:style-name="T5">Identity, meaning, and spiritual concerns</text:span></text:p>
        </text:list-item>
        <text:list-item>
          <text:p text:style-name="P10"><text:span text:style-name="T5">Adjustment to illness, injury, disability, or cognitive changes</text:span></text:p>
        </text:list-item>
        <text:list-item>
          <text:p text:style-name="P10"><text:span text:style-name="T5">Major life, family, or career transitions</text:span></text:p>
        </text:list-item>
        <text:list-item>
          <text:p text:style-name="P11"><text:span text:style-name="T5">Difficulty setting boundaries or communicating needs</text:span></text:p>
        </text:list-item>
      </text:list>
      <text:p text:style-name="P3"><text:span text:style-name="T1">Anxiety and persistent worry</text:span></text:p>
      <text:p text:style-name="P3"><text:span text:style-name="T2">Therapy may help you understand patterns of worry, fear, avoidance, reassurance-seeking, and physical tension. Treatment can focus on developing more flexible ways of responding to uncertainty and anxiety-provoking situations.</text:span></text:p>
      <text:p text:style-name="P3"><text:span text:style-name="T1">Depression and reduced motivation</text:span></text:p>
      <text:p text:style-name="P3"><text:span text:style-name="T2">Psychotherapy may help address low mood, withdrawal, hopelessness, self-criticism, and reduced engagement in meaningful activities. Work may include understanding contributing factors, rebuilding daily structure, and reconnecting with values and sources of meaning.</text:span></text:p>
      <text:p text:style-name="P3"><text:span text:style-name="T1">Trauma and post-traumatic stress</text:span></text:p>
      <text:p text:style-name="P3"><text:soft-page-break/><text:span text:style-name="T2">Trauma can affect thoughts, emotions, relationships, sleep, attention, bodily responses, and a person’s sense of safety. Trauma-informed therapy proceeds carefully and collaboratively, with attention to stabilization, coping skills, and the client’s readiness to process difficult experiences.</text:span></text:p>
      <text:p text:style-name="P3"><text:span text:style-name="T1">Grief and loss</text:span></text:p>
      <text:p text:style-name="P3"><text:span text:style-name="T2">Loss may involve the death of a loved one, the end of a relationship, changes in health or functioning, migration, career disruption, or the loss of an expected future. Therapy can provide space to process grief while finding ways to continue living meaningfully.</text:span></text:p>
      <text:p text:style-name="P3"><text:span text:style-name="T1">Stress and burnout</text:span></text:p>
      <text:p text:style-name="P3"><text:span text:style-name="T2">Persistent stress can affect mood, sleep, concentration, relationships, and physical wellbeing. Therapy can help identify patterns that maintain overload and support more sustainable boundaries, coping strategies, and routines.</text:span></text:p>
      <text:p text:style-name="P3"><text:span text:style-name="T1">Relationships and attachment</text:span></text:p>
      <text:p text:style-name="P3"><text:span text:style-name="T2">Past and present relationships can influence how we experience closeness, trust, rejection, conflict, and vulnerability. Therapy may help identify recurring patterns, strengthen communication, and develop healthier ways of relating to oneself and others.</text:span></text:p>
      <text:p text:style-name="P3"><text:span text:style-name="T1">Therapeutic approaches</text:span></text:p>
      <text:p text:style-name="P3"><text:span text:style-name="T2">No single therapy approach is appropriate for every person. Treatment is selected and adapted according to the client’s concerns, goals, preferences, and clinical needs.</text:span></text:p>
      <text:p text:style-name="P3"><text:span text:style-name="T1">Cognitive Behavioural Therapy (CBT)</text:span></text:p>
      <text:p text:style-name="P3"><text:span text:style-name="T2">CBT explores connections among thoughts, emotions, behaviours, and physical responses. It can help clients identify patterns that contribute to distress and practise more effective ways of responding.</text:span></text:p>
      <text:p text:style-name="P3"><text:span text:style-name="T1">Cognitive Processing Therapy (CPT)</text:span></text:p>
      <text:p text:style-name="P3"><text:span text:style-name="T2">CPT is a structured, evidence-based treatment for post-traumatic stress. It focuses on trauma-related beliefs or “stuck points” that may affect safety, trust, power, control, esteem, and intimacy.</text:span></text:p>
      <text:p text:style-name="P3"><text:span text:style-name="T1">Attachment-informed therapy</text:span></text:p>
      <text:p text:style-name="P3"><text:span text:style-name="T2">Attachment-informed work explores how early and later relationships may influence emotional needs, trust, closeness, conflict, boundaries, and patterns of self-protection.</text:span></text:p>
      <text:p text:style-name="P1"/>
      <text:p text:style-name="P3"><text:span text:style-name="T1">Schema-informed therapy</text:span></text:p>
      <text:p text:style-name="P3"><text:span text:style-name="T2">Schema-informed work considers deeply established beliefs and coping patterns that may have developed in response to unmet emotional needs or difficult life experiences.</text:span></text:p>
      <text:p text:style-name="P3"><text:span text:style-name="T1">Trauma-informed care</text:span></text:p>
      <text:p text:style-name="P3"><text:span text:style-name="T2">Trauma-informed care emphasizes emotional and physical safety, collaboration, choice, pacing, and respect for the client’s autonomy.</text:span></text:p>
      <text:p text:style-name="P3"><text:span text:style-name="T1">Emotion-regulation and skills-based strategies</text:span></text:p>
      <text:p text:style-name="P3"><text:soft-page-break/><text:span text:style-name="T2">Practical skills may be used to support grounding, distress tolerance, emotional awareness, communication, sleep, behavioural activation, and coping with difficult situations.</text:span></text:p>
      <text:p text:style-name="P3"><text:span text:style-name="T1">What to expect in therapy</text:span></text:p>
      <text:p text:style-name="P3"><text:span text:style-name="T1">Initial consultation</text:span></text:p>
      <text:p text:style-name="P3"><text:span text:style-name="T2">A complimentary 15-minute consultation provides an opportunity to briefly discuss what brings you to therapy, ask practical questions, and consider whether the clinician’s approach may be a good fit.</text:span></text:p>
      <text:p text:style-name="P3"><text:span text:style-name="T1">First appointment</text:span></text:p>
      <text:p text:style-name="P3"><text:span text:style-name="T2">The first appointment focuses on understanding your current concerns, relevant history, goals, strengths, and expectations for therapy. You do not need to share every detail immediately.</text:span></text:p>
      <text:p text:style-name="P3"><text:span text:style-name="T1">Collaborative treatment planning</text:span></text:p>
      <text:p text:style-name="P3"><text:span text:style-name="T2">Together, you and your therapist will identify priorities and develop an initial plan. Therapy goals may change as your circumstances and understanding develop.</text:span></text:p>
      <text:p text:style-name="P3"><text:span text:style-name="T1">Ongoing sessions</text:span></text:p>
      <text:p text:style-name="P3"><text:span text:style-name="T2">Sessions may include discussion, reflection, psychoeducation, structured exercises, coping strategies, and between-session practice. The pace and focus are reviewed collaboratively.</text:span></text:p>
      <text:p text:style-name="P3"><text:span text:style-name="T1">Reviewing progress</text:span></text:p>
      <text:p text:style-name="P3"><text:span text:style-name="T2">Progress is discussed throughout therapy. This may include changes in symptoms, relationships, daily functioning, coping, self-understanding, or movement toward personally meaningful goals.</text:span></text:p>
      <text:p text:style-name="P3"><text:span text:style-name="T1">Confidentiality</text:span></text:p>
      <text:p text:style-name="P3"><text:span text:style-name="T2">Psychotherapy is confidential. Information is not shared without your consent except where disclosure is permitted or required by law or professional obligations.</text:span></text:p>
      <text:p text:style-name="P3"><text:span text:style-name="T2">The limits of confidentiality will be reviewed before therapy begins. These may include situations involving imminent risk of serious harm, concerns about the safety of a child, requirements related to certain legal proceedings, or other circumstances established by applicable law and professional standards.</text:span></text:p>
      <text:p text:style-name="P3"><text:span text:style-name="T2">Electronic communication carries privacy limitations. Please avoid sending detailed or sensitive health information by regular email or text.</text:span></text:p>
      <text:p text:style-name="P3"><text:span text:style-name="T1">Frequently asked questions</text:span></text:p>
      <text:p text:style-name="P3"><text:span text:style-name="T1">How often are sessions scheduled?</text:span></text:p>
      <text:p text:style-name="P3"><text:span text:style-name="T2">Many clients begin with weekly or biweekly sessions. Frequency depends on clinical needs, goals, availability, and practical circumstances.</text:span></text:p>
      <text:p text:style-name="P3"><text:span text:style-name="T1">How long is each session?</text:span></text:p>
      <text:p text:style-name="P3"><text:span text:style-name="T2">The usual session length and fee will be discussed before services begin. Longer appointments may be arranged when clinically appropriate and available.</text:span></text:p>
      <text:p text:style-name="P3"><text:soft-page-break/><text:span text:style-name="T1">Is therapy offered virtually or in person?</text:span></text:p>
      <text:p text:style-name="P3"><text:span text:style-name="T2">Available service formats should be confirmed during the consultation. Virtual care may not be appropriate for every clinical situation or location.</text:span></text:p>
      <text:p text:style-name="P3"><text:span text:style-name="T1">How many sessions will I need?</text:span></text:p>
      <text:p text:style-name="P3"><text:span text:style-name="T2">The length of therapy varies. Some clients seek focused, short-term work, while others benefit from longer-term therapy. Treatment duration is reviewed collaboratively.</text:span></text:p>
      <text:p text:style-name="P3"><text:span text:style-name="T1">Will therapy involve homework?</text:span></text:p>
      <text:p text:style-name="P3"><text:span text:style-name="T2">Between-session exercises may be suggested when useful. These can include reflection, tracking patterns, practising skills, reading brief materials, or taking a small action connected to therapy goals.</text:span></text:p>
      <text:p text:style-name="P3"><text:span text:style-name="T1">Are psychotherapy services covered by insurance?</text:span></text:p>
      <text:p text:style-name="P3"><text:span text:style-name="T2">Many extended health-benefit plans provide some coverage for psychotherapy. Clients should confirm the eligible professional designation, annual limits, referral requirements, and reimbursement process with their insurer.</text:span></text:p>
      <text:p text:style-name="P3"><text:span text:style-name="T1">Begin with a conversation</text:span></text:p>
      <text:p text:style-name="P3"><text:span text:style-name="T2">A complimentary 15-minute consultation can help you ask questions, discuss what you are looking for, and consider whether psychotherapy through our practice may be an appropriate next step.</text:span></text:p>
      <text:p text:style-name="P7"><text:span text:style-name="T4">Primary button: Book a Free 15-Minute Consultation</text:span></text:p>
      <text:p text:style-name="P13"><text:span text:style-name="T1">Suggested global footer: </text:span><text:span text:style-name="T2">Neuropsychological assessments for children through older adulthood and evidence-based psychotherapy for adults.</text:span></text:p>
      <text:p text:style-name="P1"/>
      <text:p text:style-name="P6"><text:span text:style-name="T3">PAGE 5</text:span></text:p>
      <text:p text:style-name="P3"><text:span text:style-name="T2">Education</text:span></text:p>
      <text:p text:style-name="P12"/>
      <text:p text:style-name="P3"><text:span text:style-name="T1">Clear information supports informed decisions.</text:span></text:p>
      <text:p text:style-name="P3"><text:span text:style-name="T2">This section provides accessible education about neuropsychological assessment, neurodivergence, cognitive functioning, emotional wellbeing, and psychotherapy.</text:span></text:p>
      <text:p text:style-name="P3"><text:span text:style-name="T2">The information is intended to help individuals and families better understand common terms and processes. It does not replace individualized assessment, diagnosis, medical advice, or treatment.</text:span></text:p>
      <text:p text:style-name="P3"><text:span text:style-name="T1">Understanding neuropsychological assessment</text:span></text:p>
      <text:p text:style-name="P3"><text:span text:style-name="T2">A neuropsychological assessment is a comprehensive evaluation of cognitive, emotional, behavioural, and everyday functioning. It may include interviews, standardized testing, questionnaires, record review, behavioural observations, feedback, and a written report. The assessment is guided by a specific referral question and interpreted within the person’s developmental, medical, educational, psychological, cultural, and social context.</text:span></text:p>
      <text:p text:style-name="P3"><text:soft-page-break/><text:span text:style-name="T1">Understanding neurodiversity and neurodivergence</text:span></text:p>
      <text:p text:style-name="P3"><text:span text:style-name="T2">Neurodiversity refers to the natural variation in how human brains develop and function. Neurodivergent is a broad term often used by people whose attention, learning, communication, sensory processing, or cognitive style differs from what is considered typical. The term may include ADHD, autism, learning disorders, developmental differences, tic disorders, and other patterns. A neuro-affirming approach recognizes both support needs and meaningful strengths.</text:span></text:p>
      <text:p text:style-name="P3"><text:span text:style-name="T1">Attention-deficit/hyperactivity disorder (ADHD)</text:span></text:p>
      <text:p text:style-name="P3"><text:span text:style-name="T2">ADHD is associated with persistent differences in attention regulation, impulse control, activity level, organization, time management, and executive functioning. Presentation can vary across people and across the lifespan. Assessment considers developmental history, functioning in more than one setting, emotional wellbeing, sleep, medical factors, and other conditions that may produce similar symptoms.</text:span></text:p>
      <text:p text:style-name="P3"><text:span text:style-name="T1">Autism and autistic experiences</text:span></text:p>
      <text:p text:style-name="P3"><text:span text:style-name="T2">Autism is a developmental difference that may involve communication style, social interaction, sensory processing, routines, focused interests, flexibility, and patterns of emotional regulation. Autistic people are highly diverse. Assessment should consider both observable behaviour and the person’s internal experience, adaptations, strengths, and support needs.</text:span></text:p>
      <text:p text:style-name="P1"/>
      <text:p text:style-name="P3"><text:span text:style-name="T1">Specific learning disorders</text:span></text:p>
      <text:p text:style-name="P3"><text:span text:style-name="T2">A specific learning disorder may affect reading, written expression, mathematics, or a combination of academic skills. Difficulties are not explained simply by low effort. Assessment examines academic achievement alongside cognitive processes, educational opportunities, developmental history, language, attention, and emotional factors.</text:span></text:p>
      <text:p text:style-name="P3"><text:span text:style-name="T1">Executive functioning</text:span></text:p>
      <text:p text:style-name="P3"><text:span text:style-name="T2">Executive functions are mental processes that support planning, organization, initiation, inhibition, flexible thinking, working memory, self-monitoring, and goal-directed behaviour. Executive-function difficulties can affect school, work, home responsibilities, relationships, and independent living. They may occur in ADHD, autism, neurological conditions, mood disorders, trauma, sleep disruption, or other circumstances.</text:span></text:p>
      <text:p text:style-name="P3"><text:span text:style-name="T1">Memory and cognitive changes</text:span></text:p>
      <text:p text:style-name="P3"><text:span text:style-name="T2">Memory concerns can arise for many reasons, including normal aging, stress, anxiety, depression, sleep problems, medications, pain, medical illness, neurological conditions, or neurocognitive disorders. Neuropsychological assessment can help identify the pattern of strengths and weaknesses and determine whether further medical investigation or support may be appropriate.</text:span></text:p>
      <text:p text:style-name="P3"><text:span text:style-name="T1">Anxiety and cognitive functioning</text:span></text:p>
      <text:p text:style-name="P3"><text:span text:style-name="T2">Anxiety can interfere with concentration, working memory, processing speed, decision-making, sleep, and confidence. When a person is highly anxious, mental resources may be directed toward monitoring threat or managing distress. Assessment and therapy can help distinguish between primary cognitive difficulties and cognitive inefficiency related to emotional distress.</text:span></text:p>
      <text:p text:style-name="P3"><text:span text:style-name="T1">Trauma and the nervous system</text:span></text:p>
      <text:p text:style-name="P3"><text:span text:style-name="T2">Trauma may influence attention, memory, sleep, emotional regulation, bodily arousal, trust, and a person’s sense of safety. Responses such as hypervigilance, avoidance, emotional numbing, or strong physiological reactions can be understood as adaptations to overwhelming experiences. Trauma-informed care emphasizes safety, choice, collaboration, and appropriate pacing.</text:span></text:p>
      <text:p text:style-name="P3"><text:span text:style-name="T1">Screening, assessment, diagnosis, and psychotherapy</text:span></text:p>
      <text:p text:style-name="P3"><text:span text:style-name="T2">A screening tool identifies whether further evaluation may be warranted but does not usually establish a diagnosis. A comprehensive assessment gathers and integrates multiple sources of information. A diagnosis is a clinical conclusion based on established criteria and professional judgment. Psychotherapy is a treatment process that helps a person address emotional, behavioural, relational, or trauma-related concerns.</text:span></text:p>
      <text:p text:style-name="P3"><text:span text:style-name="T1">Understanding an assessment report</text:span></text:p>
      <text:p text:style-name="P3"><text:span text:style-name="T2">An assessment report usually describes the referral question, relevant background, tests and procedures, behavioural observations, results, clinical interpretation, diagnostic impressions when applicable, and recommendations. Scores should not be read in isolation. The overall pattern and the individual’s context are more informative than any single number.</text:span></text:p>
      <text:p text:style-name="P3"><text:soft-page-break/><text:span text:style-name="T1">Supporting a neurodivergent family member</text:span></text:p>
      <text:p text:style-name="P3"><text:span text:style-name="T2">Support begins with listening and learning how the individual experiences the world. Helpful approaches may include predictable routines, clear communication, sensory accommodations, visual supports, reduced shame, collaborative problem-solving, and respect for preferred language and identity. Support should be individualized rather than based on assumptions about a diagnosis.</text:span></text:p>
      <text:p text:style-name="P3"><text:span text:style-name="T1">Suggested educational article links</text:span></text:p>
      <text:list xml:id="list51525391316798" text:continue-numbering="true" text:style-name="WWNum1">
        <text:list-item>
          <text:p text:style-name="P10"><text:span text:style-name="T5">What to Expect During a Neuropsychological Assessment</text:span></text:p>
        </text:list-item>
        <text:list-item>
          <text:p text:style-name="P10"><text:span text:style-name="T5">Understanding ADHD Across the Lifespan</text:span></text:p>
        </text:list-item>
        <text:list-item>
          <text:p text:style-name="P10"><text:span text:style-name="T5">Neurodiversity: Strengths, Differences, and Support Needs</text:span></text:p>
        </text:list-item>
        <text:list-item>
          <text:p text:style-name="P10"><text:span text:style-name="T5">Executive Functioning in Everyday Life</text:span></text:p>
        </text:list-item>
        <text:list-item>
          <text:p text:style-name="P10"><text:span text:style-name="T5">When Memory Changes May Need Further Assessment</text:span></text:p>
        </text:list-item>
        <text:list-item>
          <text:p text:style-name="P10"><text:span text:style-name="T5">How Anxiety and Trauma Can Affect Concentration</text:span></text:p>
        </text:list-item>
        <text:list-item>
          <text:p text:style-name="P10"><text:span text:style-name="T5">Helping a Child Prepare for an Assessment</text:span></text:p>
        </text:list-item>
        <text:list-item>
          <text:p text:style-name="P11"><text:span text:style-name="T5">Understanding Your Neuropsychological Assessment Report</text:span></text:p>
        </text:list-item>
      </text:list>
      <text:p text:style-name="P3"><text:span text:style-name="T1">Educational disclaimer</text:span></text:p>
      <text:p text:style-name="P3"><text:span text:style-name="T2">The educational content on this website is general in nature. It should not be used to diagnose a condition, determine treatment, or replace consultation with a qualified healthcare professional.</text:span></text:p>
      <text:p text:style-name="P13"><text:span text:style-name="T1">Suggested global footer: </text:span><text:span text:style-name="T2">Neuropsychological assessments for children through older adulthood and evidence-based psychotherapy for adults.</text:span></text:p>
      <text:p text:style-name="P1"/>
      <text:p text:style-name="P6"><text:span text:style-name="T3">PAGE 6</text:span></text:p>
      <text:p text:style-name="P3"><text:span text:style-name="T2">Resources</text:span></text:p>
      <text:p text:style-name="P12"/>
      <text:p text:style-name="P3"><text:span text:style-name="T1">Practical information for preparing and finding support.</text:span></text:p>
      <text:p text:style-name="P3"><text:span text:style-name="T2">This page provides practical guidance for people considering an assessment or psychotherapy, along with general information about referrals, insurance, privacy, and urgent support.</text:span></text:p>
      <text:p text:style-name="P3"><text:span text:style-name="T1">Preparing for a neuropsychological assessment</text:span></text:p>
      <text:list xml:id="list51526366829819" text:continue-numbering="true" text:style-name="WWNum1">
        <text:list-item>
          <text:p text:style-name="P10"><text:soft-page-break/><text:span text:style-name="T5">Review the appointment date, time, location, and expected duration.</text:span></text:p>
        </text:list-item>
        <text:list-item>
          <text:p text:style-name="P10"><text:span text:style-name="T5">Take prescribed medications as usual unless your healthcare provider or the assessment team gives different instructions.</text:span></text:p>
        </text:list-item>
        <text:list-item>
          <text:p text:style-name="P10"><text:span text:style-name="T5">Bring glasses, hearing aids, mobility supports, or other items you normally use.</text:span></text:p>
        </text:list-item>
        <text:list-item>
          <text:p text:style-name="P10"><text:span text:style-name="T5">Try to obtain adequate sleep and eat before the appointment.</text:span></text:p>
        </text:list-item>
        <text:list-item>
          <text:p text:style-name="P10"><text:span text:style-name="T5">Bring a list of current medications and relevant medical information.</text:span></text:p>
        </text:list-item>
        <text:list-item>
          <text:p text:style-name="P10"><text:span text:style-name="T5">Bring previous assessment reports, school records, report cards, individualized education plans, or medical records when requested.</text:span></text:p>
        </text:list-item>
        <text:list-item>
          <text:p text:style-name="P10"><text:span text:style-name="T5">Let the practice know in advance about language, accessibility, sensory, mobility, or communication needs.</text:span></text:p>
        </text:list-item>
        <text:list-item>
          <text:p text:style-name="P11"><text:span text:style-name="T5">Avoid alcohol or non-prescribed substances before testing.</text:span></text:p>
        </text:list-item>
      </text:list>
      <text:p text:style-name="P3"><text:span text:style-name="T2">Testing is intended to understand how you function. You do not need to study, and you are not expected to perform perfectly.</text:span></text:p>
      <text:p text:style-name="P3"><text:span text:style-name="T1">Preparing a child or adolescent</text:span></text:p>
      <text:p text:style-name="P3"><text:span text:style-name="T2">Use simple and reassuring language. Explain that the appointment will involve different activities that help the clinician understand how the child learns and solves problems.</text:span></text:p>
      <text:list xml:id="list51525507721605" text:continue-numbering="true" text:style-name="WWNum1">
        <text:list-item>
          <text:p text:style-name="P10"><text:span text:style-name="T5">Avoid describing the assessment as an examination that must be passed.</text:span></text:p>
        </text:list-item>
        <text:list-item>
          <text:p text:style-name="P10"><text:span text:style-name="T5">Tell the child that some activities may feel easy and others may feel difficult.</text:span></text:p>
        </text:list-item>
        <text:list-item>
          <text:p text:style-name="P10"><text:span text:style-name="T5">Encourage effort without creating pressure about results.</text:span></text:p>
        </text:list-item>
        <text:list-item>
          <text:p text:style-name="P10"><text:span text:style-name="T5">Bring glasses, hearing devices, medications, comfort items, snacks, and relevant school information.</text:span></text:p>
        </text:list-item>
        <text:list-item>
          <text:p text:style-name="P11"><text:span text:style-name="T5">Share information about sensory needs, anxiety, communication preferences, or behavioural supports before the appointment.</text:span></text:p>
        </text:list-item>
      </text:list>
      <text:p text:style-name="P3"><text:span text:style-name="T1">Documents that may be helpful</text:span></text:p>
      <text:list xml:id="list51525069011452" text:continue-numbering="true" text:style-name="WWNum1">
        <text:list-item>
          <text:p text:style-name="P10"><text:span text:style-name="T5">Referral letter, if applicable</text:span></text:p>
        </text:list-item>
        <text:list-item>
          <text:p text:style-name="P10"><text:span text:style-name="T5">Previous psychological, neuropsychological, psychiatric, speech-language, occupational therapy, or educational assessments</text:span></text:p>
        </text:list-item>
        <text:list-item>
          <text:p text:style-name="P10"><text:span text:style-name="T5">Medical or neurological reports</text:span></text:p>
        </text:list-item>
        <text:list-item>
          <text:p text:style-name="P10"><text:span text:style-name="T5">Medication list</text:span></text:p>
        </text:list-item>
        <text:list-item>
          <text:p text:style-name="P10"><text:soft-page-break/><text:span text:style-name="T5">School report cards and individualized education plans</text:span></text:p>
        </text:list-item>
        <text:list-item>
          <text:p text:style-name="P10"><text:span text:style-name="T5">Workplace or disability documentation relevant to the referral</text:span></text:p>
        </text:list-item>
        <text:list-item>
          <text:p text:style-name="P11"><text:span text:style-name="T5">Completed questionnaires provided by the practice</text:span></text:p>
        </text:list-item>
      </text:list>
      <text:p text:style-name="P3"><text:span text:style-name="T1">Preparing for psychotherapy</text:span></text:p>
      <text:p text:style-name="P3"><text:span text:style-name="T2">You do not need to prepare a detailed account of your life before the first session. It may be helpful to think about what is currently most difficult, what you hope will change, and any questions you have about the therapist’s approach.</text:span></text:p>
      <text:list xml:id="list51526961570592" text:continue-numbering="true" text:style-name="WWNum1">
        <text:list-item>
          <text:p text:style-name="P10"><text:span text:style-name="T5">Choose a private and reasonably quiet space for virtual sessions.</text:span></text:p>
        </text:list-item>
        <text:list-item>
          <text:p text:style-name="P10"><text:span text:style-name="T5">Check your internet connection and device before the appointment.</text:span></text:p>
        </text:list-item>
        <text:list-item>
          <text:p text:style-name="P10"><text:span text:style-name="T5">Have emergency contact information and your current location available for virtual care when required.</text:span></text:p>
        </text:list-item>
        <text:list-item>
          <text:p text:style-name="P10"><text:span text:style-name="T5">Consider writing down medications, relevant diagnoses, and major current stressors.</text:span></text:p>
        </text:list-item>
        <text:list-item>
          <text:p text:style-name="P11"><text:span text:style-name="T5">Tell the therapist about accessibility, communication, cultural, spiritual, or identity-related considerations that matter to you.</text:span></text:p>
        </text:list-item>
      </text:list>
      <text:p text:style-name="P3"><text:span text:style-name="T1">Referrals</text:span></text:p>
      <text:p text:style-name="P3"><text:span text:style-name="T2">A physician’s referral may not always be required to contact the practice. Referral requirements can depend on the service, the referral question, the payer, or the organization requesting an assessment.</text:span></text:p>
      <text:p text:style-name="P3"><text:span text:style-name="T2">Third-party referrals may involve different consent, reporting, and confidentiality arrangements. These will be explained before the service begins.</text:span></text:p>
      <text:p text:style-name="P3"><text:span text:style-name="T1">Fees and insurance</text:span></text:p>
      <text:p text:style-name="P3"><text:span text:style-name="T2">Fees depend on the type and complexity of the service. Expected fees, payment arrangements, cancellation terms, and the estimated scope of work will be discussed before services begin.</text:span></text:p>
      <text:p text:style-name="P3"><text:span text:style-name="T2">Some extended health-benefit plans cover psychological or psychotherapy services. Coverage varies. Before booking, consider asking your insurer:</text:span></text:p>
      <text:list xml:id="list51524925507123" text:continue-numbering="true" text:style-name="WWNum1">
        <text:list-item>
          <text:p text:style-name="P10"><text:span text:style-name="T5">Does my plan cover psychological assessment or psychotherapy?</text:span></text:p>
        </text:list-item>
        <text:list-item>
          <text:p text:style-name="P10"><text:span text:style-name="T5">Which professional designations are eligible?</text:span></text:p>
        </text:list-item>
        <text:list-item>
          <text:p text:style-name="P10"><text:span text:style-name="T5">Is a physician’s referral required?</text:span></text:p>
        </text:list-item>
        <text:list-item>
          <text:p text:style-name="P10"><text:span text:style-name="T5">What is my annual or per-session maximum?</text:span></text:p>
        </text:list-item>
        <text:list-item>
          <text:p text:style-name="P10"><text:span text:style-name="T5">Do I need pre-authorization?</text:span></text:p>
        </text:list-item>
        <text:list-item>
          <text:p text:style-name="P11"><text:soft-page-break/><text:span text:style-name="T5">How do I submit receipts for reimbursement?</text:span></text:p>
        </text:list-item>
      </text:list>
      <text:p text:style-name="P3"><text:span text:style-name="T2">The practice cannot guarantee reimbursement. Clients remain responsible for understanding their benefits and for payment of fees.</text:span></text:p>
      <text:p text:style-name="P1"/>
      <text:p text:style-name="P3"><text:span text:style-name="T1">Privacy and electronic communication</text:span></text:p>
      <text:p text:style-name="P3"><text:span text:style-name="T2">Personal health information is handled in accordance with applicable privacy legislation, professional standards, and practice policies.</text:span></text:p>
      <text:p text:style-name="P3"><text:span text:style-name="T2">Email and text messaging are convenient but may not be fully secure. Please use them primarily for scheduling and administrative communication, and avoid sending detailed clinical or health information.</text:span></text:p>
      <text:p text:style-name="P3"><text:span text:style-name="T1">Urgent and crisis support</text:span></text:p>
      <text:p text:style-name="P3"><text:span text:style-name="T2">This practice website and consultation request form are not monitored as emergency services.</text:span></text:p>
      <text:p text:style-name="P3"><text:span text:style-name="T2">If you are in immediate danger or require urgent medical or psychiatric assistance, call 911 or go to the nearest emergency department.</text:span></text:p>
      <text:p text:style-name="P3"><text:span text:style-name="T2">For current crisis-line and community support information, consult official provincial, federal, or local health resources. Crisis contact details should be reviewed regularly before being posted because services and availability can change.</text:span></text:p>
      <text:p text:style-name="P3"><text:span text:style-name="T1">Frequently asked practical questions</text:span></text:p>
      <text:p text:style-name="P3"><text:span text:style-name="T1">Can I book directly?</text:span></text:p>
      <text:p text:style-name="P3"><text:span text:style-name="T2">Prospective clients may request a complimentary consultation. The practice will confirm whether the requested service is available and appropriate.</text:span></text:p>
      <text:p text:style-name="P3"><text:span text:style-name="T1">What should I include in a consultation request?</text:span></text:p>
      <text:p text:style-name="P3"><text:span text:style-name="T2">Provide your name, preferred contact information, the general service you are seeking, and a brief non-sensitive description of the concern. Avoid detailed personal health information in the initial web form or email.</text:span></text:p>
      <text:p text:style-name="P3"><text:span text:style-name="T1">What happens after I submit a request?</text:span></text:p>
      <text:p text:style-name="P3"><text:span text:style-name="T2">The practice will contact you to discuss the service, fit, availability, fees, and next steps. Submitting a request does not establish a clinician-client relationship.</text:span></text:p>
      <text:p text:style-name="P3"><text:span text:style-name="T1">Can records be sent to another professional?</text:span></text:p>
      <text:p text:style-name="P3"><text:span text:style-name="T2">Records or reports may be shared with your written consent, subject to professional, legal, and practice requirements.</text:span></text:p>
      <text:p text:style-name="P3"><text:span text:style-name="T1">Can assessment results be used for accommodations?</text:span></text:p>
      <text:p text:style-name="P3"><text:span text:style-name="T2">Recommendations may support an accommodation request when clinically justified. The receiving school, employer, licensing body, insurer, or government program decides whether accommodations are approved.</text:span></text:p>
      <text:p text:style-name="P3"><text:soft-page-break/><text:span text:style-name="T2">Recommended resource categories</text:span></text:p>
      <text:list xml:id="list51526462466343" text:continue-numbering="true" text:style-name="WWNum1">
        <text:list-item>
          <text:p text:style-name="P10"><text:span text:style-name="T5">Ontario mental health and crisis resources</text:span></text:p>
        </text:list-item>
        <text:list-item>
          <text:p text:style-name="P10"><text:span text:style-name="T5">Neurodiversity and autism education</text:span></text:p>
        </text:list-item>
        <text:list-item>
          <text:p text:style-name="P10"><text:span text:style-name="T5">ADHD education</text:span></text:p>
        </text:list-item>
        <text:list-item>
          <text:p text:style-name="P10"><text:span text:style-name="T5">Learning disability organizations</text:span></text:p>
        </text:list-item>
        <text:list-item>
          <text:p text:style-name="P10"><text:span text:style-name="T5">Brain injury and neurological support organizations</text:span></text:p>
        </text:list-item>
        <text:list-item>
          <text:p text:style-name="P10"><text:span text:style-name="T5">Caregiver resources</text:span></text:p>
        </text:list-item>
        <text:list-item>
          <text:p text:style-name="P10"><text:span text:style-name="T5">School and postsecondary accommodation information</text:span></text:p>
        </text:list-item>
        <text:list-item>
          <text:p text:style-name="P11"><text:span text:style-name="T5">Grief and trauma resources</text:span></text:p>
        </text:list-item>
      </text:list>
      <text:p text:style-name="P3"><text:span text:style-name="T2">Only reputable, current organizations should be linked. External links should be reviewed periodically to ensure that they remain accurate and active.</text:span></text:p>
      <text:p text:style-name="P3"><text:span text:style-name="T2">Contact</text:span></text:p>
      <text:p text:style-name="P3"><text:span text:style-name="T2">Phone or text: 705-321-8146</text:span></text:p>
      <text:p text:style-name="P3"><text:span text:style-name="T2">Email: drsauriolassociates@neuropsychologicalassessments.com</text:span></text:p>
      <text:p text:style-name="P3"><text:span text:style-name="T2">Please avoid including sensitive personal or health information in email, text messages, or the initial consultation request.</text:span></text:p>
      <text:p text:style-name="P7"><text:span text:style-name="T4">Primary button: Book a Free 15-Minute Consultation</text:span></text:p>
      <text:p text:style-name="P13"><text:span text:style-name="T1">Suggested global footer: </text:span><text:span text:style-name="T2">Neuropsychological assessments for children through older adulthood and evidence-based psychotherapy for adults.</text:span></text:p>
      <text:p text:style-name="P1"/>
      <text:p text:style-name="P14"><text:span text:style-name="T2">Website Implementation Notes</text:span></text:p>
      <text:p text:style-name="P12"/>
      <text:list xml:id="list51526423878291" text:continue-numbering="true" text:style-name="WWNum1">
        <text:list-item>
          <text:p text:style-name="P10"><text:span text:style-name="T5">Primary navigation: Home | Assessments | Clinicians | Psychotherapy | Education | Resources.</text:span></text:p>
        </text:list-item>
        <text:list-item>
          <text:p text:style-name="P10"><text:span text:style-name="T5">Keep the Free 15-Minute Consultation button visible in the header as a call to action rather than a main navigation title.</text:span></text:p>
        </text:list-item>
        <text:list-item>
          <text:p text:style-name="P10"><text:span text:style-name="T5">Use the same footer wording across all pages.</text:span></text:p>
        </text:list-item>
        <text:list-item>
          <text:p text:style-name="P10"><text:span text:style-name="T5">Use short paragraphs and generous white space on the live website.</text:span></text:p>
        </text:list-item>
        <text:list-item>
          <text:p text:style-name="P10"><text:span text:style-name="T5">Break long educational sections into cards, accordions, or individual articles.</text:span></text:p>
        </text:list-item>
        <text:list-item>
          <text:p text:style-name="P10"><text:span text:style-name="T5">Confirm all clinician credentials, titles, locations, languages, service formats, fees, and supervision statements before publication.</text:span></text:p>
        </text:list-item>
        <text:list-item>
          <text:p text:style-name="P10"><text:span text:style-name="T5">Have the privacy policy, consent process, and emergency wording reviewed for compliance with Ontario professional and privacy requirements.</text:span></text:p>
        </text:list-item>
        <text:list-item>
          <text:p text:style-name="P10"><text:span text:style-name="T5">Do not promise a diagnosis, accommodation approval, insurance reimbursement, or treatment outcome.</text:span></text:p>
        </text:list-item>
        <text:list-item>
          <text:p text:style-name="P11"><text:span text:style-name="T5">Review external resource links and crisis information regularly.</text:span></text:p>
        </text:list-item>
      </text:list>
      <text:p text:style-name="P1"/>
      <text:p text:style-name="P3"><text:span text:style-name="T1">Suggested global footer:</text:span></text:p>
      <text:p text:style-name="P3"><text:span text:style-name="T2">Neuropsychological assessments for children through older adulthood and evidence-based psychotherapy for adults.</text:span></text:p>
      <text:p text:style-name="P3"><text:span text:style-name="T2">Phone or text: 705-321-8146</text:span></text:p>
      <text:p text:style-name="P3"><text:span text:style-name="T2">Email: drsauriolassociates@neuropsychologicalassessments.com</text:span></text:p>
      <text:p text:style-name="P3"><text:span text:style-name="T2">Please avoid including sensitive personal or health information in email or text messa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ptos" svg:font-family="Aptos" style:font-family-generic="roman" style:font-pitch="variable"/>
    <style:font-face style:name="Calibri" svg:font-family="Calibri" style:font-family-generic="roman" style:font-pitch="variable"/>
    <style:font-face style:name="Play" svg:font-family="Play"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ptos1" svg:font-family="Aptos"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lay1" svg:font-family="Play"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ptos" fo:font-size="10.5pt" fo:language="en" fo:country="none" style:letter-kerning="false" style:font-name-asian="Aptos1" style:font-size-asian="10.5pt" style:language-asian="zh" style:country-asian="CN" style:font-name-complex="Aptos1"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ptos" fo:font-size="10.5pt" fo:language="en" fo:country="none" style:letter-kerning="false" style:font-name-asian="Aptos1" style:font-size-asian="10.5pt" style:language-asian="zh" style:country-asian="CN" style:font-name-complex="Aptos1"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line-height="11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5in" fo:margin-bottom="0.111in" loext:contextual-spacing="false" fo:line-height="100%" fo:keep-together="always" fo:keep-with-next="always"/>
      <style:text-properties fo:color="#23374a" style:font-name="Play" fo:font-family="Play" style:font-family-generic="roman" style:font-pitch="variable" fo:font-size="20pt" fo:font-weight="bold" style:font-name-asian="Play1" style:font-family-asian="Play" style:font-family-generic-asian="system" style:font-pitch-asian="variable" style:font-size-asian="20pt" style:font-weight-asian="bold" style:font-name-complex="Play1" style:font-family-complex="Play" style:font-family-generic-complex="system" style:font-pitch-complex="variable" style:font-size-complex="20pt" style:font-weight-complex="bold"/>
    </style:style>
    <style:style style:name="Heading_20_2" style:display-name="Heading 2" style:family="paragraph" style:parent-style-name="normal" style:next-style-name="Standard" style:default-outline-level="" style:class="text">
      <style:paragraph-properties fo:margin-top="0.1945in" fo:margin-bottom="0.0835in" loext:contextual-spacing="false" fo:line-height="100%" fo:keep-together="always" fo:keep-with-next="always"/>
      <style:text-properties fo:color="#397074" style:font-name="Play" fo:font-family="Play" style:font-family-generic="roman" style:font-pitch="variable" fo:font-size="15pt" fo:font-weight="bold" style:font-name-asian="Play1" style:font-family-asian="Play" style:font-family-generic-asian="system" style:font-pitch-asian="variable" style:font-size-asian="15pt" style:font-weight-asian="bold" style:font-name-complex="Play1" style:font-family-complex="Play" style:font-family-generic-complex="system" style:font-pitch-complex="variable" style:font-size-complex="15pt" style:font-weight-complex="bold"/>
    </style:style>
    <style:style style:name="Heading_20_3" style:display-name="Heading 3" style:family="paragraph" style:parent-style-name="normal" style:next-style-name="Standard" style:default-outline-level="" style:class="text">
      <style:paragraph-properties fo:margin-top="0.139in" fo:margin-bottom="0.0555in" loext:contextual-spacing="false" fo:line-height="100%" fo:keep-together="always" fo:keep-with-next="always"/>
      <style:text-properties fo:color="#23374a" style:font-name="Aptos" fo:font-family="Aptos" style:font-family-generic="roman" style:font-pitch="variable" fo:font-size="12pt" fo:font-weight="bold" style:font-name-asian="Aptos1" style:font-family-asian="Aptos" style:font-family-generic-asian="system" style:font-pitch-asian="variable" style:font-size-asian="12pt" style:font-weight-asian="bold" style:font-name-complex="Aptos1" style:font-family-complex="Aptos" style:font-family-generic-complex="system" style:font-pitch-complex="variable" style:font-size-complex="12pt" style:font-weight-complex="bold"/>
    </style:style>
    <style:style style:name="Heading_20_4" style:display-name="Heading 4"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tyle="italic" fo:font-weight="bold" style:font-name-asian="Calibri1" style:font-family-asian="Calibri" style:font-family-generic-asian="system" style:font-pitch-asian="variable" style:font-style-asian="italic" style:font-weight-asian="bold" style:font-name-complex="Calibri1" style:font-family-complex="Calibri" style:font-family-generic-complex="system" style:font-pitch-complex="variable" style:font-style-complex="italic" style:font-weight-complex="bold"/>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243f61"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243f61"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111in" loext:contextual-spacing="false" fo:line-height="100%" fo:padding-left="0in" fo:padding-right="0in" fo:padding-top="0in" fo:padding-bottom="0.0555in" fo:border-left="none" fo:border-right="none" fo:border-top="none" fo:border-bottom="0.99pt solid #4f81bd"/>
      <style:text-properties fo:color="#23374a" style:font-name="Play" fo:font-family="Play" style:font-family-generic="roman" style:font-pitch="variable" fo:font-size="26pt" fo:font-weight="bold" style:font-name-asian="Play1" style:font-family-asian="Play" style:font-family-generic-asian="system" style:font-pitch-asian="variable" style:font-size-asian="26pt" style:font-weight-asian="bold" style:font-name-complex="Play1" style:font-family-complex="Play" style:font-family-generic-complex="system" style:font-pitch-complex="variable" style:font-size-complex="26pt" style:font-weight-complex="bold"/>
    </style:style>
    <style:style style:name="Subtitle" style:family="paragraph" style:parent-style-name="normal" style:next-style-name="Standard" style:default-outline-level="" style:class="chapter">
      <style:paragraph-properties fo:margin-top="0in" fo:margin-bottom="0.25in" loext:contextual-spacing="false" fo:line-height="100%"/>
      <style:text-properties fo:color="#5a636c" style:font-name="Aptos" fo:font-family="Aptos" style:font-family-generic="roman" style:font-pitch="variable" fo:font-size="13pt" fo:font-style="italic" fo:font-weight="normal" style:font-name-asian="Aptos1" style:font-family-asian="Aptos" style:font-family-generic-asian="system" style:font-pitch-asian="variable" style:font-size-asian="13pt" style:font-style-asian="italic" style:font-weight-asian="normal" style:font-name-complex="Aptos1" style:font-family-complex="Aptos" style:font-family-generic-complex="system" style:font-pitch-complex="variable" style:font-size-complex="13pt" style:font-style-complex="italic" style:font-weight-complex="normal"/>
    </style:style>
    <style:style style:name="Head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4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MT1" style:family="text">
      <style:text-properties fo:font-variant="normal" fo:text-transform="none" fo:color="#5a636c" style:text-line-through-style="none" style:text-line-through-type="none" style:text-position="0% 100%" style:font-name="Aptos" fo:font-size="8.5pt" fo:font-style="normal" style:text-underline-style="none" fo:font-weight="normal" style:font-name-asian="Aptos1" style:font-size-asian="8.5pt" style:font-style-asian="normal" style:font-weight-asian="normal" style:font-name-complex="Aptos1" style:font-size-complex="8.5pt" style:font-style-complex="normal" style:font-weight-complex="normal"/>
    </style:style>
    <style:page-layout style:name="Mpm1">
      <style:page-layout-properties fo:page-width="8.5in" fo:page-height="11in" style:num-format="1" style:print-orientation="portrait" fo:margin-top="0.5in" fo:margin-bottom="0.75in" fo:margin-left="0.85in" fo:margin-right="0.8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page-layout>
  </office:automatic-styles>
  <office:master-styles>
    <style:master-page style:name="Standard" style:page-layout-name="Mpm1">
      <style:header>
        <text:p text:style-name="MP1"><text:span text:style-name="MT1">Neuropsychological Assessments and Psychotherapy</text:span></text:p>
        <text:p text:style-name="MP1"><text:page-number text:select-page="current">2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25" meta:paragraph-count="477" meta:word-count="5827" meta:character-count="44171" meta:non-whitespace-character-count="38954"/>
    <meta:generator>LibreOfficeDev/6.0.5.2$Linux_X86_64 LibreOffice_project/</meta:generator>
  </office:meta>
</office:document-meta>
</file>